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0EC8D57719605E3B110.png" manifest:media-type="image/png"/>
  <manifest:file-entry manifest:full-path="Pictures/10000000000005BA000001DC130B82D6F0E3313A.png" manifest:media-type="image/png"/>
  <manifest:file-entry manifest:full-path="Pictures/1000000000000690000002C4B9C76C8C86DBDB50.png" manifest:media-type="image/png"/>
  <manifest:file-entry manifest:full-path="Pictures/1000000000000582000001FD63727F698BD2A4E2.png" manifest:media-type="image/png"/>
  <manifest:file-entry manifest:full-path="Pictures/10000000000001A90000008EA583D93712AF255F.png" manifest:media-type="image/png"/>
  <manifest:file-entry manifest:full-path="Pictures/10000000000005660000017B7BCEFBEC50A8EA4D.png" manifest:media-type="image/png"/>
  <manifest:file-entry manifest:full-path="Pictures/10000000000000E6000000E168133E72094ED198.png" manifest:media-type="image/png"/>
  <manifest:file-entry manifest:full-path="Pictures/1000000000000200000001192BB0743363127266.png" manifest:media-type="image/png"/>
  <manifest:file-entry manifest:full-path="Pictures/100000000000027B000001FC6706694644269AA9.png" manifest:media-type="image/png"/>
  <manifest:file-entry manifest:full-path="Pictures/1000000000000574000001C13DA182C4A2277B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fo:language="en" fo:country="US" officeooo:rsid="00377f03" officeooo:paragraph-rsid="00377f03"/>
    </style:style>
    <style:style style:name="P2" style:family="paragraph" style:parent-style-name="Standard">
      <style:text-properties fo:language="en" fo:country="US" officeooo:rsid="00377f03" officeooo:paragraph-rsid="00377f03"/>
    </style:style>
    <style:style style:name="P3" style:family="paragraph" style:parent-style-name="Standard">
      <style:text-properties fo:language="en" fo:country="US" officeooo:rsid="00193d19" officeooo:paragraph-rsid="00193d19"/>
    </style:style>
    <style:style style:name="P4" style:family="paragraph" style:parent-style-name="Text_20_body">
      <style:text-properties fo:language="en" fo:country="US" officeooo:rsid="00275d74" officeooo:paragraph-rsid="00275d74"/>
    </style:style>
    <style:style style:name="P5" style:family="paragraph" style:parent-style-name="Text_20_body">
      <style:text-properties fo:language="en" fo:country="US" officeooo:rsid="002d282d" officeooo:paragraph-rsid="002d282d"/>
    </style:style>
    <style:style style:name="P6" style:family="paragraph" style:parent-style-name="Text_20_body">
      <style:text-properties fo:language="en" fo:country="US" officeooo:rsid="00404dc6" officeooo:paragraph-rsid="00404dc6"/>
    </style:style>
    <style:style style:name="P7" style:family="paragraph" style:parent-style-name="Text_20_body">
      <style:text-properties officeooo:paragraph-rsid="00121b28"/>
    </style:style>
    <style:style style:name="P8" style:family="paragraph" style:parent-style-name="Text_20_body">
      <style:text-properties style:rfc-language-tag="sr-Latn-RS" fo:language="sr" fo:script="Latn" fo:country="RS" officeooo:rsid="002a3aff" officeooo:paragraph-rsid="002a3aff"/>
    </style:style>
    <style:style style:name="P9" style:family="paragraph" style:parent-style-name="Text_20_body">
      <style:text-properties style:rfc-language-tag="sr-Latn-RS" fo:language="sr" fo:script="Latn" fo:country="RS" officeooo:rsid="002af43b" officeooo:paragraph-rsid="002af43b"/>
    </style:style>
    <style:style style:name="P10" style:family="paragraph" style:parent-style-name="Text_20_body">
      <style:text-properties style:rfc-language-tag="sr-Latn-RS" fo:language="sr" fo:script="Latn" fo:country="RS" officeooo:rsid="002fe7ce" officeooo:paragraph-rsid="002fe7ce"/>
    </style:style>
    <style:style style:name="P11" style:family="paragraph" style:parent-style-name="Text_20_body">
      <style:text-properties style:rfc-language-tag="sr-Latn-RS" fo:language="sr" fo:script="Latn" fo:country="RS" officeooo:rsid="0033b3e7" officeooo:paragraph-rsid="0033b3e7"/>
    </style:style>
    <style:style style:name="P12" style:family="paragraph" style:parent-style-name="Text_20_body">
      <style:text-properties style:rfc-language-tag="sr-Latn-RS" fo:language="sr" fo:script="Latn" fo:country="RS" officeooo:rsid="00369328" officeooo:paragraph-rsid="00369328"/>
    </style:style>
    <style:style style:name="P13" style:family="paragraph" style:parent-style-name="Text_20_body">
      <style:text-properties style:rfc-language-tag="sr-Latn-RS" fo:language="sr" fo:script="Latn" fo:country="RS" officeooo:rsid="0022099e" officeooo:paragraph-rsid="0022099e"/>
    </style:style>
    <style:style style:name="P14" style:family="paragraph" style:parent-style-name="Text_20_body">
      <style:text-properties style:rfc-language-tag="sr-Latn-RS" fo:language="sr" fo:script="Latn" fo:country="RS" officeooo:rsid="003301a6" officeooo:paragraph-rsid="003301a6"/>
    </style:style>
    <style:style style:name="P15" style:family="paragraph" style:parent-style-name="Text_20_body">
      <style:text-properties style:rfc-language-tag="sr-Latn-RS" fo:language="sr" fo:script="Latn" fo:country="RS" officeooo:rsid="003301a6" officeooo:paragraph-rsid="00520e81"/>
    </style:style>
    <style:style style:name="P16" style:family="paragraph" style:parent-style-name="Text_20_body">
      <style:text-properties style:rfc-language-tag="sr-Latn-RS" fo:language="sr" fo:script="Latn" fo:country="RS" officeooo:rsid="003ffaac" officeooo:paragraph-rsid="0033b3e7"/>
    </style:style>
    <style:style style:name="P17" style:family="paragraph" style:parent-style-name="Text_20_body">
      <style:text-properties style:rfc-language-tag="sr-Latn-RS" fo:language="sr" fo:script="Latn" fo:country="RS" officeooo:rsid="003ffaac" officeooo:paragraph-rsid="003ffaac"/>
    </style:style>
    <style:style style:name="P18" style:family="paragraph" style:parent-style-name="Text_20_body">
      <style:text-properties style:rfc-language-tag="sr-Latn-RS" fo:language="sr" fo:script="Latn" fo:country="RS" officeooo:rsid="00289180" officeooo:paragraph-rsid="00289180"/>
    </style:style>
    <style:style style:name="P19" style:family="paragraph" style:parent-style-name="Text_20_body">
      <style:text-properties style:rfc-language-tag="sr-Latn-RS" fo:language="sr" fo:script="Latn" fo:country="RS" fo:font-weight="normal" officeooo:rsid="002a3aff" officeooo:paragraph-rsid="002a3aff" style:font-weight-asian="normal" style:font-weight-complex="normal"/>
    </style:style>
    <style:style style:name="P20" style:family="paragraph" style:parent-style-name="Text_20_body">
      <style:text-properties style:rfc-language-tag="sr-Latn-RS" fo:language="sr" fo:script="Latn" fo:country="RS" fo:font-weight="normal" officeooo:rsid="002af43b" officeooo:paragraph-rsid="002af43b" style:font-weight-asian="normal" style:font-weight-complex="normal"/>
    </style:style>
    <style:style style:name="P21" style:family="paragraph" style:parent-style-name="Text_20_body">
      <style:text-properties style:rfc-language-tag="sr-Latn-RS" fo:language="sr" fo:script="Latn" fo:country="RS" officeooo:rsid="0040ac5c" officeooo:paragraph-rsid="0040ac5c"/>
    </style:style>
    <style:style style:name="P22" style:family="paragraph" style:parent-style-name="Text_20_body">
      <style:text-properties style:rfc-language-tag="sr-Latn-RS" fo:language="sr" fo:script="Latn" fo:country="RS" officeooo:rsid="00463b0d" officeooo:paragraph-rsid="00463b0d"/>
    </style:style>
    <style:style style:name="P23" style:family="paragraph" style:parent-style-name="Text_20_body">
      <style:text-properties style:rfc-language-tag="sr-Latn-RS" fo:language="sr" fo:script="Latn" fo:country="RS" officeooo:rsid="004729fe" officeooo:paragraph-rsid="0049000a"/>
    </style:style>
    <style:style style:name="P24" style:family="paragraph" style:parent-style-name="Text_20_body">
      <style:text-properties style:rfc-language-tag="sr-Latn-RS" fo:language="sr" fo:script="Latn" fo:country="RS" officeooo:rsid="004256f3" officeooo:paragraph-rsid="004256f3"/>
    </style:style>
    <style:style style:name="P25" style:family="paragraph" style:parent-style-name="Text_20_body">
      <style:text-properties style:rfc-language-tag="sr-Latn-RS" fo:language="sr" fo:script="Latn" fo:country="RS" officeooo:rsid="0017aedc" officeooo:paragraph-rsid="001984a4"/>
    </style:style>
    <style:style style:name="P26" style:family="paragraph" style:parent-style-name="Text_20_body">
      <style:text-properties style:rfc-language-tag="sr-Latn-RS" fo:language="sr" fo:script="Latn" fo:country="RS" officeooo:rsid="0040270f" officeooo:paragraph-rsid="003ffaac"/>
    </style:style>
    <style:style style:name="P27" style:family="paragraph" style:parent-style-name="Text_20_body">
      <style:text-properties style:rfc-language-tag="sr-Latn-RS" fo:language="sr" fo:script="Latn" fo:country="RS" officeooo:rsid="0040270f" officeooo:paragraph-rsid="0040270f"/>
    </style:style>
    <style:style style:name="P28" style:family="paragraph" style:parent-style-name="Text_20_body">
      <style:text-properties style:rfc-language-tag="sr-Latn-RS" fo:language="sr" fo:script="Latn" fo:country="RS" officeooo:rsid="001a7f49" officeooo:paragraph-rsid="001984a4"/>
    </style:style>
    <style:style style:name="P29" style:family="paragraph" style:parent-style-name="Text_20_body">
      <style:text-properties style:rfc-language-tag="sr-Latn-RS" fo:language="sr" fo:script="Latn" fo:country="RS" officeooo:rsid="00184a9a" officeooo:paragraph-rsid="001a7f49"/>
    </style:style>
    <style:style style:name="P30" style:family="paragraph" style:parent-style-name="Standard">
      <style:paragraph-properties fo:text-align="center" style:justify-single-word="false"/>
      <style:text-properties style:font-name="Liberation Sans" officeooo:paragraph-rsid="00121b28"/>
    </style:style>
    <style:style style:name="P31" style:family="paragraph" style:parent-style-name="Standard">
      <style:paragraph-properties fo:text-align="center" style:justify-single-word="false"/>
      <style:text-properties style:font-name="Liberation Sans" fo:language="de" fo:country="DE" officeooo:paragraph-rsid="00121b28"/>
    </style:style>
    <style:style style:name="P32" style:family="paragraph" style:parent-style-name="Standard">
      <style:text-properties style:font-name="Liberation Sans" fo:language="de" fo:country="DE" officeooo:paragraph-rsid="00121b28"/>
    </style:style>
    <style:style style:name="P33" style:family="paragraph" style:parent-style-name="Standard">
      <style:text-properties style:font-name="Liberation Sans" officeooo:paragraph-rsid="00121b28"/>
    </style:style>
    <style:style style:name="P34" style:family="paragraph" style:parent-style-name="Standard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35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36" style:family="paragraph" style:parent-style-name="Standard">
      <style:paragraph-properties fo:text-align="start" style:justify-single-word="false"/>
      <style:text-properties style:font-name="Liberation Sans" officeooo:paragraph-rsid="00121b28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de" fo:country="DE" officeooo:paragraph-rsid="00121b2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officeooo:rsid="00121b28" officeooo:paragraph-rsid="00121b2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fo:font-weight="bold" officeooo:rsid="00121b28" officeooo:paragraph-rsid="00121b28" style:font-size-asian="12pt" style:font-weight-asian="bold" style:font-size-complex="12pt" style:font-weight-complex="bold"/>
    </style:style>
    <style:style style:name="P40" style:family="paragraph" style:parent-style-name="Text_20_body">
      <style:text-properties officeooo:rsid="00184a9a" officeooo:paragraph-rsid="001a7f49"/>
    </style:style>
    <style:style style:name="P41" style:family="paragraph" style:parent-style-name="Text_20_body">
      <style:text-properties officeooo:rsid="00184a9a" officeooo:paragraph-rsid="00520e81"/>
    </style:style>
    <style:style style:name="P42" style:family="paragraph" style:parent-style-name="Text_20_body">
      <style:text-properties officeooo:rsid="001984a4" officeooo:paragraph-rsid="001984a4"/>
    </style:style>
    <style:style style:name="P43" style:family="paragraph" style:parent-style-name="Text_20_body">
      <style:text-properties officeooo:rsid="001c00a9" officeooo:paragraph-rsid="001c00a9"/>
    </style:style>
    <style:style style:name="P44" style:family="paragraph" style:parent-style-name="Text_20_body">
      <style:text-properties officeooo:rsid="001d6376" officeooo:paragraph-rsid="001d6376"/>
    </style:style>
    <style:style style:name="P45" style:family="paragraph" style:parent-style-name="Text_20_body">
      <style:text-properties officeooo:rsid="0022099e" officeooo:paragraph-rsid="0022099e"/>
    </style:style>
    <style:style style:name="P46" style:family="paragraph" style:parent-style-name="Text_20_body">
      <style:text-properties officeooo:rsid="002fe7ce" officeooo:paragraph-rsid="002fe7ce"/>
    </style:style>
    <style:style style:name="P47" style:family="paragraph" style:parent-style-name="Text_20_body">
      <style:text-properties officeooo:paragraph-rsid="00377f03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Standard">
      <style:text-properties fo:color="#000000" loext:opacity="100%" fo:background-color="#fffffe"/>
    </style:style>
    <style:style style:name="P52" style:family="paragraph" style:parent-style-name="Standard">
      <style:text-properties fo:color="#000000" loext:opacity="100%" officeooo:rsid="003ffaac" officeooo:paragraph-rsid="003ffaac" fo:background-color="#fffffe"/>
    </style:style>
    <style:style style:name="P53" style:family="paragraph" style:parent-style-name="Standard">
      <style:text-properties fo:color="#000000" loext:opacity="100%" officeooo:rsid="0040270f" officeooo:paragraph-rsid="0040270f" fo:background-color="#fffffe"/>
    </style:style>
    <style:style style:name="P54" style:family="paragraph" style:parent-style-name="Standard">
      <style:text-properties fo:color="#000000" loext:opacity="100%" fo:language="en" fo:country="US" officeooo:rsid="00404dc6" officeooo:paragraph-rsid="00404dc6" fo:background-color="#fffffe"/>
    </style:style>
    <style:style style:name="P55" style:family="paragraph" style:parent-style-name="Text_20_body">
      <style:text-properties officeooo:rsid="003ffaac" officeooo:paragraph-rsid="003ffaac"/>
    </style:style>
    <style:style style:name="P56" style:family="paragraph" style:parent-style-name="Text_20_body">
      <style:text-properties officeooo:rsid="0040270f" officeooo:paragraph-rsid="0040270f"/>
    </style:style>
    <style:style style:name="P57" style:family="paragraph" style:parent-style-name="Text_20_body">
      <style:text-properties officeooo:rsid="00209ca8" officeooo:paragraph-rsid="00502a80"/>
    </style:style>
    <style:style style:name="P58" style:family="paragraph" style:parent-style-name="Text_20_body">
      <style:text-properties officeooo:rsid="00174d6e" officeooo:paragraph-rsid="00520e81"/>
    </style:style>
    <style:style style:name="P59" style:family="paragraph" style:parent-style-name="Standard" style:master-page-name="First_20_Page">
      <style:paragraph-properties fo:text-align="center" style:justify-single-word="false" style:page-number="auto"/>
      <style:text-properties style:font-name="Liberation Sans" fo:font-size="12pt" fo:language="de" fo:country="DE" officeooo:paragraph-rsid="00121b28" style:font-size-asian="12pt" style:font-size-complex="12pt"/>
    </style:style>
    <style:style style:name="P60" style:family="paragraph" style:parent-style-name="Heading_20_1">
      <style:paragraph-properties fo:break-before="page"/>
      <style:text-properties officeooo:rsid="00121b28" officeooo:paragraph-rsid="00121b28"/>
    </style:style>
    <style:style style:name="P61" style:family="paragraph" style:parent-style-name="Heading_20_1">
      <style:paragraph-properties fo:break-before="page"/>
      <style:text-properties style:rfc-language-tag="sr-Latn-RS" fo:language="sr" fo:script="Latn" fo:country="RS" officeooo:rsid="00174d6e" officeooo:paragraph-rsid="00174d6e"/>
    </style:style>
    <style:style style:name="P62" style:family="paragraph" style:parent-style-name="Heading_20_1">
      <style:paragraph-properties fo:break-before="page"/>
      <style:text-properties style:rfc-language-tag="sr-Latn-RS" fo:language="sr" fo:script="Latn" fo:country="RS" officeooo:rsid="0022099e" officeooo:paragraph-rsid="0022099e"/>
    </style:style>
    <style:style style:name="P63" style:family="paragraph" style:parent-style-name="Heading_20_1">
      <style:paragraph-properties fo:break-before="page"/>
      <style:text-properties style:rfc-language-tag="sr-Latn-RS" fo:language="sr" fo:script="Latn" fo:country="RS" officeooo:rsid="003301a6" officeooo:paragraph-rsid="003301a6"/>
    </style:style>
    <style:style style:name="P64" style:family="paragraph" style:parent-style-name="Heading_20_1">
      <style:paragraph-properties fo:break-before="page"/>
      <style:text-properties fo:language="en" fo:country="US" officeooo:rsid="00394547" officeooo:paragraph-rsid="00394547"/>
    </style:style>
    <style:style style:name="P65" style:family="paragraph" style:parent-style-name="Heading_20_2">
      <style:text-properties style:rfc-language-tag="sr-Latn-RS" fo:language="sr" fo:script="Latn" fo:country="RS" officeooo:rsid="0025cf3f" officeooo:paragraph-rsid="0025cf3f"/>
    </style:style>
    <style:style style:name="P66" style:family="paragraph" style:parent-style-name="Heading_20_2">
      <style:text-properties style:rfc-language-tag="sr-Latn-RS" fo:language="sr" fo:script="Latn" fo:country="RS" officeooo:rsid="003ffaac" officeooo:paragraph-rsid="003ffaac"/>
    </style:style>
    <style:style style:name="P67" style:family="paragraph" style:parent-style-name="Heading_20_2">
      <style:text-properties style:rfc-language-tag="sr-Latn-RS" fo:language="sr" fo:script="Latn" fo:country="RS" officeooo:rsid="004256f3" officeooo:paragraph-rsid="004256f3"/>
    </style:style>
    <style:style style:name="P68" style:family="paragraph" style:parent-style-name="Text_20_body" style:list-style-name="L1">
      <style:text-properties officeooo:paragraph-rsid="0022099e"/>
    </style:style>
    <style:style style:name="P69" style:family="paragraph" style:parent-style-name="Text_20_body" style:list-style-name="L2">
      <style:text-properties style:rfc-language-tag="sr-Latn-RS" fo:language="sr" fo:script="Latn" fo:country="RS" officeooo:rsid="00289180" officeooo:paragraph-rsid="00289180"/>
    </style:style>
    <style:style style:name="P70" style:family="paragraph" style:parent-style-name="Text_20_body" style:list-style-name="L2">
      <style:text-properties style:rfc-language-tag="sr-Latn-RS" fo:language="sr" fo:script="Latn" fo:country="RS" officeooo:rsid="00289180" officeooo:paragraph-rsid="002a3aff"/>
    </style:style>
    <style:style style:name="P71" style:family="paragraph" style:parent-style-name="Text_20_body" style:list-style-name="L3">
      <style:text-properties style:rfc-language-tag="sr-Latn-RS" fo:language="sr" fo:script="Latn" fo:country="RS" officeooo:rsid="002fe7ce" officeooo:paragraph-rsid="002fe7ce"/>
    </style:style>
    <style:style style:name="P72" style:family="paragraph" style:parent-style-name="Text_20_body" style:list-style-name="L4">
      <style:text-properties style:rfc-language-tag="sr-Latn-RS" fo:language="sr" fo:script="Latn" fo:country="RS" officeooo:rsid="00463b0d" officeooo:paragraph-rsid="00463b0d"/>
    </style:style>
    <style:style style:name="P73" style:family="paragraph" style:parent-style-name="Text_20_body" style:list-style-name="L4">
      <style:text-properties style:rfc-language-tag="sr-Latn-RS" fo:language="sr" fo:script="Latn" fo:country="RS" fo:font-style="italic" officeooo:rsid="004729fe" officeooo:paragraph-rsid="004729fe" style:font-style-asian="italic" style:font-style-complex="italic"/>
    </style:style>
    <style:style style:name="P74" style:family="paragraph" style:parent-style-name="Text_20_body" style:list-style-name="L5">
      <style:text-properties style:rfc-language-tag="sr-Latn-RS" fo:language="sr" fo:script="Latn" fo:country="RS" officeooo:rsid="0049000a" officeooo:paragraph-rsid="0049000a"/>
    </style:style>
    <style:style style:name="P75" style:family="paragraph" style:parent-style-name="Text_20_body" style:list-style-name="L5">
      <style:text-properties style:rfc-language-tag="sr-Latn-RS" fo:language="sr" fo:script="Latn" fo:country="RS" officeooo:rsid="0049000a" officeooo:paragraph-rsid="0049e2d6"/>
    </style:style>
    <style:style style:name="P76" style:family="paragraph" style:parent-style-name="Text_20_body" style:list-style-name="L5">
      <style:text-properties style:rfc-language-tag="sr-Latn-RS" fo:language="sr" fo:script="Latn" fo:country="RS" officeooo:rsid="0049e2d6" officeooo:paragraph-rsid="0049e2d6"/>
    </style:style>
    <style:style style:name="P77" style:family="paragraph" style:parent-style-name="Text_20_body" style:list-style-name="L6">
      <style:text-properties style:rfc-language-tag="sr-Latn-RS" fo:language="sr" fo:script="Latn" fo:country="RS" officeooo:rsid="0017aedc" officeooo:paragraph-rsid="00520e81"/>
    </style:style>
    <style:style style:name="P78" style:family="paragraph" style:parent-style-name="Text_20_body" style:list-style-name="L6">
      <style:text-properties style:rfc-language-tag="sr-Latn-RS" fo:language="sr" fo:script="Latn" fo:country="RS" officeooo:rsid="00184a9a" officeooo:paragraph-rsid="00520e81"/>
    </style:style>
    <style:style style:name="P79" style:family="paragraph" style:parent-style-name="Text_20_body" style:list-style-name="L8">
      <style:text-properties style:rfc-language-tag="sr-Latn-RS" fo:language="sr" fo:script="Latn" fo:country="RS" officeooo:rsid="003b1f49" officeooo:paragraph-rsid="003b1f49"/>
    </style:style>
    <style:style style:name="P80" style:family="paragraph" style:parent-style-name="Text_20_body" style:list-style-name="L4"/>
    <style:style style:name="P81" style:family="paragraph" style:parent-style-name="Text_20_body" style:list-style-name="L6">
      <style:text-properties officeooo:paragraph-rsid="00520e81"/>
    </style:style>
    <style:style style:name="P82" style:family="paragraph" style:parent-style-name="Text_20_body" style:list-style-name="L7">
      <style:text-properties fo:language="en" fo:country="US" officeooo:rsid="003d66a6" officeooo:paragraph-rsid="003d66a6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21b28"/>
    </style:style>
    <style:style style:name="T3" style:family="text">
      <style:text-properties style:rfc-language-tag="sr-Latn-RS" fo:language="sr" fo:script="Latn" fo:country="RS" officeooo:rsid="00138dad"/>
    </style:style>
    <style:style style:name="T4" style:family="text">
      <style:text-properties style:rfc-language-tag="sr-Latn-RS" fo:language="sr" fo:script="Latn" fo:country="RS" officeooo:rsid="0016598e"/>
    </style:style>
    <style:style style:name="T5" style:family="text">
      <style:text-properties style:rfc-language-tag="sr-Latn-RS" fo:language="sr" fo:script="Latn" fo:country="RS" officeooo:rsid="00174d6e"/>
    </style:style>
    <style:style style:name="T6" style:family="text">
      <style:text-properties style:rfc-language-tag="sr-Latn-RS" fo:language="sr" fo:script="Latn" fo:country="RS" officeooo:rsid="0017aedc"/>
    </style:style>
    <style:style style:name="T7" style:family="text">
      <style:text-properties style:rfc-language-tag="sr-Latn-RS" fo:language="sr" fo:script="Latn" fo:country="RS" officeooo:rsid="00184a9a"/>
    </style:style>
    <style:style style:name="T8" style:family="text">
      <style:text-properties style:rfc-language-tag="sr-Latn-RS" fo:language="sr" fo:script="Latn" fo:country="RS" officeooo:rsid="00193d19"/>
    </style:style>
    <style:style style:name="T9" style:family="text">
      <style:text-properties style:rfc-language-tag="sr-Latn-RS" fo:language="sr" fo:script="Latn" fo:country="RS" officeooo:rsid="001a7f49"/>
    </style:style>
    <style:style style:name="T10" style:family="text">
      <style:text-properties style:rfc-language-tag="sr-Latn-RS" fo:language="sr" fo:script="Latn" fo:country="RS" officeooo:rsid="001c00a9"/>
    </style:style>
    <style:style style:name="T11" style:family="text">
      <style:text-properties style:rfc-language-tag="sr-Latn-RS" fo:language="sr" fo:script="Latn" fo:country="RS" officeooo:rsid="001d6376"/>
    </style:style>
    <style:style style:name="T12" style:family="text">
      <style:text-properties style:rfc-language-tag="sr-Latn-RS" fo:language="sr" fo:script="Latn" fo:country="RS" officeooo:rsid="001e3d75"/>
    </style:style>
    <style:style style:name="T13" style:family="text">
      <style:text-properties style:rfc-language-tag="sr-Latn-RS" fo:language="sr" fo:script="Latn" fo:country="RS" officeooo:rsid="001ec5a7"/>
    </style:style>
    <style:style style:name="T14" style:family="text">
      <style:text-properties style:rfc-language-tag="sr-Latn-RS" fo:language="sr" fo:script="Latn" fo:country="RS" officeooo:rsid="00209ca8"/>
    </style:style>
    <style:style style:name="T15" style:family="text">
      <style:text-properties style:rfc-language-tag="sr-Latn-RS" fo:language="sr" fo:script="Latn" fo:country="RS" officeooo:rsid="0022099e"/>
    </style:style>
    <style:style style:name="T16" style:family="text">
      <style:text-properties style:rfc-language-tag="sr-Latn-RS" fo:language="sr" fo:script="Latn" fo:country="RS" officeooo:rsid="0022b9c0"/>
    </style:style>
    <style:style style:name="T17" style:family="text">
      <style:text-properties style:rfc-language-tag="sr-Latn-RS" fo:language="sr" fo:script="Latn" fo:country="RS" officeooo:rsid="0022f80a"/>
    </style:style>
    <style:style style:name="T18" style:family="text">
      <style:text-properties style:rfc-language-tag="sr-Latn-RS" fo:language="sr" fo:script="Latn" fo:country="RS" officeooo:rsid="0023f8e1"/>
    </style:style>
    <style:style style:name="T19" style:family="text">
      <style:text-properties style:rfc-language-tag="sr-Latn-RS" fo:language="sr" fo:script="Latn" fo:country="RS" officeooo:rsid="0025cf3f"/>
    </style:style>
    <style:style style:name="T20" style:family="text">
      <style:text-properties style:rfc-language-tag="sr-Latn-RS" fo:language="sr" fo:script="Latn" fo:country="RS" officeooo:rsid="00289180"/>
    </style:style>
    <style:style style:name="T21" style:family="text">
      <style:text-properties style:rfc-language-tag="sr-Latn-RS" fo:language="sr" fo:script="Latn" fo:country="RS" fo:font-weight="bold" style:font-weight-asian="bold" style:font-weight-complex="bold"/>
    </style:style>
    <style:style style:name="T22" style:family="text">
      <style:text-properties style:rfc-language-tag="sr-Latn-RS" fo:language="sr" fo:script="Latn" fo:country="RS" fo:font-weight="bold" officeooo:rsid="0022099e" style:font-weight-asian="bold" style:font-weight-complex="bold"/>
    </style:style>
    <style:style style:name="T23" style:family="text">
      <style:text-properties style:rfc-language-tag="sr-Latn-RS" fo:language="sr" fo:script="Latn" fo:country="RS" fo:font-weight="bold" officeooo:rsid="00209ca8" style:font-weight-asian="bold" style:font-weight-complex="bold"/>
    </style:style>
    <style:style style:name="T24" style:family="text">
      <style:text-properties style:rfc-language-tag="sr-Latn-RS" fo:language="sr" fo:script="Latn" fo:country="RS" fo:font-weight="bold" officeooo:rsid="004ad669" style:font-weight-asian="bold" style:font-weight-complex="bold"/>
    </style:style>
    <style:style style:name="T25" style:family="text">
      <style:text-properties style:rfc-language-tag="sr-Latn-RS" fo:language="sr" fo:script="Latn" fo:country="RS" officeooo:rsid="002ee0d7"/>
    </style:style>
    <style:style style:name="T26" style:family="text">
      <style:text-properties style:rfc-language-tag="sr-Latn-RS" fo:language="sr" fo:script="Latn" fo:country="RS" officeooo:rsid="0033b3e7"/>
    </style:style>
    <style:style style:name="T27" style:family="text">
      <style:text-properties style:rfc-language-tag="sr-Latn-RS" fo:language="sr" fo:script="Latn" fo:country="RS" officeooo:rsid="0034a43a"/>
    </style:style>
    <style:style style:name="T28" style:family="text">
      <style:text-properties style:rfc-language-tag="sr-Latn-RS" fo:language="sr" fo:script="Latn" fo:country="RS" officeooo:rsid="00377f03"/>
    </style:style>
    <style:style style:name="T29" style:family="text">
      <style:text-properties style:rfc-language-tag="sr-Latn-RS" fo:language="sr" fo:script="Latn" fo:country="RS" officeooo:rsid="003b1f49"/>
    </style:style>
    <style:style style:name="T30" style:family="text">
      <style:text-properties style:rfc-language-tag="sr-Latn-RS" fo:language="sr" fo:script="Latn" fo:country="RS" officeooo:rsid="003d66a6"/>
    </style:style>
    <style:style style:name="T31" style:family="text">
      <style:text-properties style:rfc-language-tag="sr-Latn-RS" fo:language="sr" fo:script="Latn" fo:country="RS" officeooo:rsid="003f1017"/>
    </style:style>
    <style:style style:name="T32" style:family="text">
      <style:text-properties style:rfc-language-tag="sr-Latn-RS" fo:language="sr" fo:script="Latn" fo:country="RS" officeooo:rsid="0040270f"/>
    </style:style>
    <style:style style:name="T33" style:family="text">
      <style:text-properties style:rfc-language-tag="sr-Latn-RS" fo:language="sr" fo:script="Latn" fo:country="RS" officeooo:rsid="00463b0d"/>
    </style:style>
    <style:style style:name="T34" style:family="text">
      <style:text-properties style:rfc-language-tag="sr-Latn-RS" fo:language="sr" fo:script="Latn" fo:country="RS" fo:font-style="italic" fo:background-color="#eeeeee" loext:char-shading-value="0" style:font-style-asian="italic" style:font-style-complex="italic"/>
    </style:style>
    <style:style style:name="T35" style:family="text">
      <style:text-properties style:rfc-language-tag="sr-Latn-RS" fo:language="sr" fo:script="Latn" fo:country="RS" officeooo:rsid="004c05fe"/>
    </style:style>
    <style:style style:name="T36" style:family="text">
      <style:text-properties style:rfc-language-tag="sr-Latn-RS" fo:language="sr" fo:script="Latn" fo:country="RS" officeooo:rsid="004cf43b"/>
    </style:style>
    <style:style style:name="T37" style:family="text">
      <style:text-properties style:rfc-language-tag="sr-Latn-RS" fo:language="sr" fo:script="Latn" fo:country="RS" officeooo:rsid="004e1498"/>
    </style:style>
    <style:style style:name="T38" style:family="text">
      <style:text-properties style:rfc-language-tag="sr-Latn-RS" fo:language="sr" fo:script="Latn" fo:country="RS" officeooo:rsid="004ff3db"/>
    </style:style>
    <style:style style:name="T39" style:family="text">
      <style:text-properties style:rfc-language-tag="sr-Latn-RS" fo:language="sr" fo:script="Latn" fo:country="RS" fo:background-color="#dde8cb" loext:char-shading-value="0"/>
    </style:style>
    <style:style style:name="T40" style:family="text">
      <style:text-properties style:rfc-language-tag="sr-Latn-RS" fo:language="sr" fo:script="Latn" fo:country="RS" fo:background-color="#dde8cb" loext:char-shading-value="0"/>
    </style:style>
    <style:style style:name="T41" style:family="text">
      <style:text-properties fo:language="de" fo:country="DE"/>
    </style:style>
    <style:style style:name="T42" style:family="text">
      <style:text-properties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size="18pt" fo:font-weight="bold" officeooo:rsid="0014cd82" style:font-size-asian="18pt" style:font-weight-asian="bold" style:font-size-complex="18pt" style:font-weight-complex="bold"/>
    </style:style>
    <style:style style:name="T44" style:family="text">
      <style:text-properties fo:font-size="18pt" fo:font-weight="bold" officeooo:rsid="0016598e" style:font-size-asian="18pt" style:font-weight-asian="bold" style:font-size-complex="18pt" style:font-weight-complex="bold"/>
    </style:style>
    <style:style style:name="T45" style:family="text">
      <style:text-properties officeooo:rsid="00138dad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193d19"/>
    </style:style>
    <style:style style:name="T48" style:family="text">
      <style:text-properties fo:language="en" fo:country="US" officeooo:rsid="001ae053"/>
    </style:style>
    <style:style style:name="T49" style:family="text">
      <style:text-properties fo:language="en" fo:country="US" officeooo:rsid="001ec5a7"/>
    </style:style>
    <style:style style:name="T50" style:family="text">
      <style:text-properties fo:language="en" fo:country="US" officeooo:rsid="00209ca8"/>
    </style:style>
    <style:style style:name="T51" style:family="text">
      <style:text-properties fo:language="en" fo:country="US" officeooo:rsid="0023f8e1"/>
    </style:style>
    <style:style style:name="T52" style:family="text">
      <style:text-properties fo:language="en" fo:country="US" fo:font-weight="normal" style:font-weight-asian="normal" style:font-weight-complex="normal"/>
    </style:style>
    <style:style style:name="T53" style:family="text">
      <style:text-properties fo:language="en" fo:country="US" fo:font-weight="normal" officeooo:rsid="002ee0d7" style:font-weight-asian="normal" style:font-weight-complex="normal"/>
    </style:style>
    <style:style style:name="T54" style:family="text">
      <style:text-properties fo:language="en" fo:country="US" officeooo:rsid="002d282d"/>
    </style:style>
    <style:style style:name="T55" style:family="text">
      <style:text-properties fo:language="en" fo:country="US" officeooo:rsid="0033b3e7"/>
    </style:style>
    <style:style style:name="T56" style:family="text">
      <style:text-properties fo:language="en" fo:country="US" officeooo:rsid="00377f03"/>
    </style:style>
    <style:style style:name="T57" style:family="text">
      <style:text-properties fo:language="en" fo:country="US" officeooo:rsid="00404dc6"/>
    </style:style>
    <style:style style:name="T58" style:family="text">
      <style:text-properties fo:language="en" fo:country="US" officeooo:rsid="0049000a"/>
    </style:style>
    <style:style style:name="T59" style:family="text">
      <style:text-properties fo:language="en" fo:country="US" fo:font-style="italic" officeooo:rsid="0049000a" fo:background-color="#eeeeee" loext:char-shading-value="0" style:font-style-asian="italic" style:font-style-complex="italic"/>
    </style:style>
    <style:style style:name="T60" style:family="text">
      <style:text-properties fo:language="en" fo:country="US" officeooo:rsid="001a7f49"/>
    </style:style>
    <style:style style:name="T61" style:family="text">
      <style:text-properties fo:language="en" fo:country="US" officeooo:rsid="004c05fe"/>
    </style:style>
    <style:style style:name="T62" style:family="text">
      <style:text-properties fo:language="en" fo:country="US" fo:font-weight="bold" style:font-weight-asian="bold" style:font-weight-complex="bold"/>
    </style:style>
    <style:style style:name="T63" style:family="text">
      <style:text-properties fo:language="en" fo:country="US" fo:background-color="#dde8cb" loext:char-shading-value="0"/>
    </style:style>
    <style:style style:name="T64" style:family="text">
      <style:text-properties fo:language="en" fo:country="US" fo:background-color="#dde8cb" loext:char-shading-value="0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2a3aff" style:font-weight-asian="bold" style:font-weight-complex="bold"/>
    </style:style>
    <style:style style:name="T67" style:family="text">
      <style:text-properties fo:font-weight="bold" fo:background-color="#dde8cb" loext:char-shading-value="0" style:font-weight-asian="bold" style:font-weight-complex="bold"/>
    </style:style>
    <style:style style:name="T68" style:family="text">
      <style:text-properties fo:font-weight="bold" fo:background-color="#dde8cb" loext:char-shading-value="0" style:font-weight-asian="bold" style:font-weight-complex="bold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2ee0d7" style:font-weight-asian="normal" style:font-weight-complex="normal"/>
    </style:style>
    <style:style style:name="T71" style:family="text">
      <style:text-properties officeooo:rsid="002a3aff"/>
    </style:style>
    <style:style style:name="T72" style:family="text">
      <style:text-properties officeooo:rsid="0031b78a"/>
    </style:style>
    <style:style style:name="T73" style:family="text">
      <style:text-properties officeooo:rsid="003985f2"/>
    </style:style>
    <style:style style:name="T74" style:family="text">
      <style:text-properties officeooo:rsid="003b1f49"/>
    </style:style>
    <style:style style:name="T75" style:family="text">
      <style:text-properties officeooo:rsid="003bda5e"/>
    </style:style>
    <style:style style:name="T76" style:family="text">
      <style:text-properties officeooo:rsid="003d66a6"/>
    </style:style>
    <style:style style:name="T77" style:family="text">
      <style:text-properties officeooo:rsid="003f1017"/>
    </style:style>
    <style:style style:name="T78" style:family="text">
      <style:text-properties fo:color="#859900" loext:opacity="100%"/>
    </style:style>
    <style:style style:name="T79" style:family="text">
      <style:text-properties fo:color="#859900" loext:opacity="100%" style:rfc-language-tag="sr-Latn-RS" fo:language="sr" fo:script="Latn" fo:country="RS" officeooo:rsid="0040270f"/>
    </style:style>
    <style:style style:name="T80" style:family="text">
      <style:text-properties fo:color="#333333" loext:opacity="100%"/>
    </style:style>
    <style:style style:name="T81" style:family="text">
      <style:text-properties fo:color="#333333" loext:opacity="100%" style:rfc-language-tag="sr-Latn-RS" fo:language="sr" fo:script="Latn" fo:country="RS" officeooo:rsid="0040270f"/>
    </style:style>
    <style:style style:name="T82" style:family="text">
      <style:text-properties fo:color="#586e75" loext:opacity="100%"/>
    </style:style>
    <style:style style:name="T83" style:family="text">
      <style:text-properties fo:color="#586e75" loext:opacity="100%" style:rfc-language-tag="sr-Latn-RS" fo:language="sr" fo:script="Latn" fo:country="RS" officeooo:rsid="0040270f"/>
    </style:style>
    <style:style style:name="T84" style:family="text">
      <style:text-properties fo:font-style="italic" fo:background-color="#eeeeee" loext:char-shading-value="0" style:font-style-asian="italic" style:font-style-complex="italic"/>
    </style:style>
    <style:style style:name="T85" style:family="text">
      <style:text-properties fo:font-style="italic" officeooo:rsid="004729fe" fo:background-color="#eeeeee" loext:char-shading-value="0" style:font-style-asian="italic" style:font-style-complex="italic"/>
    </style:style>
    <style:style style:name="T86" style:family="text">
      <style:text-properties officeooo:rsid="0049000a"/>
    </style:style>
    <style:style style:name="T87" style:family="text">
      <style:text-properties fo:background-color="#eeeeee" loext:char-shading-value="0"/>
    </style:style>
    <style:style style:name="T88" style:family="text">
      <style:text-properties fo:background-color="#eeeeee" loext:char-shading-value="0"/>
    </style:style>
    <style:style style:name="T89" style:family="text">
      <style:text-properties officeooo:rsid="0049e2d6"/>
    </style:style>
    <style:style style:name="T90" style:family="text">
      <style:text-properties officeooo:rsid="00502a80"/>
    </style:style>
    <style:style style:name="T91" style:family="text">
      <style:text-properties officeooo:rsid="00520e81"/>
    </style:style>
    <style:style style:name="T92" style:family="text">
      <style:text-properties fo:color="#2a6099" loext:opacity="100%" fo:font-weight="bold" style:font-weight-asian="bold" style:font-weight-complex="bold"/>
    </style:style>
    <style:style style:name="T93" style:family="text">
      <style:text-properties fo:color="#2a6099" loext:opacity="100%" fo:font-weight="bold" fo:background-color="#dde8cb" loext:char-shading-value="0" style:font-weight-asian="bold" style:font-weight-complex="bold"/>
    </style:style>
    <style:style style:name="T94" style:family="text">
      <style:text-properties fo:color="#2a6099" loext:opacity="100%" fo:font-weight="bold" fo:background-color="#dde8cb" loext:char-shading-value="0" style:font-weight-asian="bold" style:font-weight-complex="bold"/>
    </style:style>
    <style:style style:name="T95" style:family="text">
      <style:text-properties fo:color="#2a6099" loext:opacity="100%" fo:language="en" fo:country="US" fo:font-weight="bold" style:font-weight-asian="bold" style:font-weight-complex="bold"/>
    </style:style>
    <style:style style:name="T96" style:family="text">
      <style:text-properties fo:color="#2a6099" loext:opacity="100%" fo:language="en" fo:country="US" fo:font-weight="bold" fo:background-color="#dde8cb" loext:char-shading-value="0" style:font-weight-asian="bold" style:font-weight-complex="bold"/>
    </style:style>
    <style:style style:name="T97" style:family="text">
      <style:text-properties fo:color="#2a6099" loext:opacity="100%" fo:language="en" fo:country="US" fo:font-weight="bold" fo:background-color="#dde8cb" loext:char-shading-value="0" style:font-weight-asian="bold" style:font-weight-complex="bold"/>
    </style:style>
    <style:style style:name="T98" style:family="text">
      <style:text-properties fo:color="#2a6099" loext:opacity="100%" style:rfc-language-tag="sr-Latn-RS" fo:language="sr" fo:script="Latn" fo:country="RS" fo:font-weight="bold" style:font-weight-asian="bold" style:font-weight-complex="bold"/>
    </style:style>
    <style:style style:name="T99" style:family="text">
      <style:text-properties fo:color="#2a6099" loext:opacity="100%" style:rfc-language-tag="sr-Latn-RS" fo:language="sr" fo:script="Latn" fo:country="RS" fo:font-weight="bold" fo:background-color="#dde8cb" loext:char-shading-value="0" style:font-weight-asian="bold" style:font-weight-complex="bold"/>
    </style:style>
    <style:style style:name="T100" style:family="text">
      <style:text-properties fo:color="#2a6099" loext:opacity="100%" style:rfc-language-tag="sr-Latn-RS" fo:language="sr" fo:script="Latn" fo:country="RS" fo:font-weight="bold" fo:background-color="#dde8cb" loext:char-shading-value="0" style:font-weight-asian="bold" style:font-weight-complex="bold"/>
    </style:style>
    <style:style style:name="T101" style:family="text">
      <style:text-properties fo:background-color="#dde8cb" loext:char-shading-value="0"/>
    </style:style>
    <style:style style:name="T102" style:family="text">
      <style:text-properties fo:background-color="#dde8cb" loext:char-shading-value="0"/>
    </style:style>
    <style:style style:name="T103" style:family="text">
      <style:text-properties fo:language="sr" fo:country="RS" officeooo:rsid="00193d19"/>
    </style:style>
    <style:style style:name="T104" style:family="text">
      <style:text-properties fo:language="sr" fo:country="RS" officeooo:rsid="0057aa12"/>
    </style:style>
    <style:style style:name="T105" style:family="text">
      <style:text-properties fo:background-color="#dddddd" loext:char-shading-value="0"/>
    </style:style>
    <style:style style:name="T106" style:family="text">
      <style:text-properties fo:background-color="#dddddd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59"><draw:frame draw:style-name="fr7" draw:name="Picture 77" text:anchor-type="char" svg:x="0.302cm" svg:y="-0.757cm" svg:width="3.932cm" svg:height="3.528cm" draw:z-index="0"><draw:image xlink:href="Pictures/1000000000000107000000EC8D57719605E3B110.png" xlink:type="simple" xlink:show="embed" xlink:actuate="onLoad" draw:mime-type="image/png"/></draw:frame><draw:frame draw:style-name="fr7" draw:name="Picture 78" text:anchor-type="char" svg:x="13.487cm" svg:y="-0.757cm" svg:width="3.554cm" svg:height="3.477cm" draw:z-index="1"><draw:image xlink:href="Pictures/10000000000000E6000000E168133E72094ED198.png" xlink:type="simple" xlink:show="embed" xlink:actuate="onLoad" draw:mime-type="image/png"/></draw:frame>UNIVERZITET U NIŠU</text:p>
      <text:p text:style-name="P37">ELEKTRONSKI FAKULTET</text:p>
      <text:p text:style-name="P37">Katedra za računarstvo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>Seminarski rad</text:p>
      <text:p text:style-name="P35"><text:span text:style-name="T42">Interna struktura i organizacija indeksa </text:span><text:span text:style-name="T44">kod</text:span><text:span text:style-name="T42"> Neo4j</text:span><text:span text:style-name="T43"> baz</text:span><text:span text:style-name="T44">e</text:span></text:p>
      <text:p text:style-name="P39">Sistemi za upravljanje bazama podataka</text:p>
      <text:p text:style-name="P31"/>
      <text:p text:style-name="P31"/>
      <text:p text:style-name="P31"/>
      <text:p text:style-name="P31"/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/>
      <text:p text:style-name="P33"><text:span text:style-name="T2"><text:tab/><text:tab/>Student</text:span><text:span text:style-name="T41"><text:tab/><text:tab/><text:tab/><text:tab/><text:tab/><text:tab/></text:span><text:span text:style-name="T2"><text:tab/></text:span><text:span text:style-name="T41">Mentor:</text:span></text:p>
      <text:p text:style-name="P33"><text:span text:style-name="T2"><text:tab/></text:span><text:span text:style-name="T41">Lazar Đorđević, br ind. </text:span><text:span text:style-name="T2">1413</text:span><text:span text:style-name="T41"><text:tab/><text:tab/><text:tab/></text:span><text:span text:style-name="T2">Doc</text:span><text:span text:style-name="T41">. dr. </text:span><text:span text:style-name="T2">Aleksandar Stanimirović</text:span></text:p>
      <text:p text:style-name="P31"/>
      <text:p text:style-name="P31"/>
      <text:p text:style-name="P31"/>
      <text:p text:style-name="P31"/>
      <text:p text:style-name="P30"><text:span text:style-name="T41">Niš, 202</text:span><text:span text:style-name="T2">3</text:span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0">Sadržaj</text:p>
          </text:index-title>
          <text:p text:style-name="P48"><text:a xlink:type="simple" xlink:href="#__RefHeading___Toc19122_3731682282" text:style-name="Index_20_Link" text:visited-style-name="Index_20_Link">Uvod<text:tab/>3</text:a></text:p>
          <text:p text:style-name="P48"><text:a xlink:type="simple" xlink:href="#__RefHeading___Toc38118_3731682282" text:style-name="Index_20_Link" text:visited-style-name="Index_20_Link">Indeks (baza podataka)<text:tab/>4</text:a></text:p>
          <text:p text:style-name="P48"><text:a xlink:type="simple" xlink:href="#__RefHeading___Toc38121_3731682282" text:style-name="Index_20_Link" text:visited-style-name="Index_20_Link">Interna struktura Neo4j baze<text:tab/>5</text:a></text:p>
          <text:p text:style-name="P49"><text:a xlink:type="simple" xlink:href="#__RefHeading___Toc38478_3731682282" text:style-name="Index_20_Link" text:visited-style-name="Index_20_Link">Constraint<text:tab/>5</text:a></text:p>
          <text:p text:style-name="P49"><text:a xlink:type="simple" xlink:href="#__RefHeading___Toc38480_3731682282" text:style-name="Index_20_Link" text:visited-style-name="Index_20_Link">Tipovi indeksa<text:tab/>7</text:a></text:p>
          <text:p text:style-name="P48"><text:a xlink:type="simple" xlink:href="#__RefHeading___Toc38520_3731682282" text:style-name="Index_20_Link" text:visited-style-name="Index_20_Link">Indeksiranje<text:tab/>8</text:a></text:p>
          <text:p text:style-name="P49"><text:a xlink:type="simple" xlink:href="#__RefHeading___Toc3100_4290455764" text:style-name="Index_20_Link" text:visited-style-name="Index_20_Link">Primer lookup indeksa<text:tab/>9</text:a></text:p>
          <text:p text:style-name="P49"><text:a xlink:type="simple" xlink:href="#__RefHeading___Toc3102_4290455764" text:style-name="Index_20_Link" text:visited-style-name="Index_20_Link">Primer full-text indeksa<text:tab/>11</text:a></text:p>
          <text:p text:style-name="P48"><text:a xlink:type="simple" xlink:href="#__RefHeading___Toc19124_3731682282" text:style-name="Index_20_Link" text:visited-style-name="Index_20_Link">Reference<text:tab/>12</text:a></text:p>
        </text:index-body>
      </text:table-of-content>
      <text:p text:style-name="P36"/>
      <text:h text:style-name="P60" text:outline-level="1"><text:bookmark-start text:name="__RefHeading___Toc19122_3731682282"/>Uvod<text:bookmark-end text:name="__RefHeading___Toc19122_3731682282"/></text:h>
      <text:p text:style-name="P7"/>
      <text:p text:style-name="Text_20_body">Cilj ovog rada je <text:span text:style-name="T45">da se pokaže uticaj indeksa koje podržava Neo4j DBMS na efikasnost upita na jednostavnim primerima.</text:span><text:span text:style-name="T3"> </text:span><text:span text:style-name="T4">Većina primera je preuzeta iz dokumentacije i zapravo su ilustracija osnovnih preporuka za rad sa Neo4j DBMS-om. Podaci koji su korišćeni u primerima se mogu naći na zvaničnom sajtu Neo4j-a.</text:span></text:p>
      <text:h text:style-name="P61" text:outline-level="1"><text:bookmark-start text:name="__RefHeading___Toc38118_3731682282"/>Indeks (baza podataka)<text:bookmark-end text:name="__RefHeading___Toc38118_3731682282"/></text:h>
      <text:p text:style-name="P43"><text:span text:style-name="T5">D</text:span><text:span text:style-name="T1">BMS omogućava korisnicima baze podataka da efikasno pristupaju, pretražuju i skladište podatke.</text:span><text:span text:style-name="T46">[2] </text:span><text:span text:style-name="T1">Jedinica u kojoj se uglavnom izražava količina podataka se zove stranica (veličine stranice nisu jednake </text:span><text:span text:style-name="T11">za sve DBMS-ove veličina je uglavnom 8KB, kod nekih je konfigurabilna</text:span><text:span text:style-name="T1">)</text:span><text:span text:style-name="T11">. Podaci se pamte na eksternim uređajima, ili glavnoj memoriji. U nastavku će se koristiti izraz disk kada se govori o eksternim uređajima zbog čitljivosti. </text:span></text:p>
      <text:p text:style-name="P44"><text:span text:style-name="T12">Upis</text:span><text:span text:style-name="T1"> na disk podrazumeva da je podatak</text:span><text:span text:style-name="T12"> ili deo podatka (slog)</text:span><text:span text:style-name="T1"> ispravno zapamćen i</text:span><text:span text:style-name="T12"> da mu se nadalje može pristupiti preko ključa (ID sloga). U fajl sistemu svaki fajl</text:span><text:span text:style-name="T13"> ili deo fajla</text:span><text:span text:style-name="T12"> </text:span><text:span text:style-name="T13">pripada nekom</text:span><text:span text:style-name="T12"> </text:span><text:span text:style-name="T13">slogu</text:span><text:span text:style-name="T12">, što čini optimalnim </text:span><text:span text:style-name="T13">pretragu jednog fajla</text:span><text:span text:style-name="T12">, ali pretraga bi morala da se vrši sekvencijalno ako bi bilo potrebno da nađemo fajl na osnovu nekog uslova</text:span><text:span text:style-name="T13"> (nadalje ključ pretrage) a da ne znamo početni slog</text:span><text:span text:style-name="T12">. </text:span><text:span text:style-name="T13">Alternativa tome bi bila da se fajlovi sortiraju po ključu pretrage, ili</text:span><text:span text:style-name="T49"> </text:span><text:span text:style-name="T50">indeksiraju -</text:span><text:span text:style-name="T49"> </text:span><text:span text:style-name="T13">da </text:span><text:span text:style-name="T14">se napravi</text:span><text:span text:style-name="T13"> struktura podataka (stablo ili heš tablica) koja će za ključ pretrage moći da vrati ID sloga.</text:span><text:span text:style-name="T50">[3]</text:span><text:span text:style-name="T14"> Treba imati u vidu da je za alternativna rešenja potrebno dodatno vreme za sortiranje, ili ažuriranje strukture podataka.</text:span></text:p>
      <text:p text:style-name="P42"><text:span text:style-name="T1">Indeks je struktura podataka koja se koristi da </text:span><text:span text:style-name="T6">ubrza </text:span><text:span text:style-name="T1">pretragu</text:span><text:span text:style-name="T6"> podataka</text:span><text:span text:style-name="T1">. Da bi se to postiglo indeks sadrži redundantne podatke</text:span><text:span text:style-name="T9">. Cena ubrzanja je dodatno zauzeće diska/memorije, sporije ažuriranje/upisivanje podataka.</text:span><text:span text:style-name="T48">[1]</text:span><text:span text:style-name="T9"> </text:span></text:p>
      <text:p text:style-name="P57"><text:span text:style-name="T1">Maltene svaki DBMS koristi specifične strukture za indeksiranje.</text:span><text:span text:style-name="T37"> </text:span><text:span text:style-name="T1">Odluka o tome šta će se indeksirati i kako nije trivijalna, zato treba definisati metriku za upoređivanje operacija i upita</text:span><text:span text:style-name="T36">.</text:span><text:span text:style-name="T37"> Brzina pretrage izgleda na prvi pogled kao relevantna metrika, s obzirom na to da utiče na izvršenje upita, ali to nije uvek najbolji način za upoređivanje upita</text:span><text:span text:style-name="T38">. Na vreme izvršenja mogu da utiču procesi koji se u tom trenutku izvršavaju na serveru, pa i sam alat koji se koristi za monitoring</text:span><text:span text:style-name="T37">. </text:span><text:span text:style-name="T38">Ako se radi o instanci baze koja upisuje podatke na jedan disk, broj upisa/pristupa disku je dobar kandidat za metriku, uz pretpostavku da je vreme pristupa disku konstantno</text:span><text:span text:style-name="T1">.</text:span><text:span text:style-name="T38"> Koja metrika će se koristiti dosta zavisi od DBMS-a i alata koji su na raspolaganju. </text:span></text:p>
      <text:p text:style-name="P57"><text:span text:style-name="T38">U</text:span><text:span text:style-name="T1"> </text:span><text:span text:style-name="T37">narednom</text:span><text:span text:style-name="T1"> poglavlju će biti razmotrena interna struktura Neo4j-a</text:span><text:span text:style-name="T36"> i</text:span><text:span text:style-name="T15"> tipovi indeksa.</text:span></text:p>
      <text:h text:style-name="P62" text:outline-level="1"><text:bookmark-start text:name="__RefHeading___Toc38121_3731682282"/>Interna struktura Neo4j baze<text:bookmark-end text:name="__RefHeading___Toc38121_3731682282"/></text:h>
      <text:p text:style-name="P13">Model graf baza podataka predstavlja graf. Graf baze se mogu podeliti na:</text:p>
      <text:list xml:id="list3729376149" text:style-name="L1">
        <text:list-item>
          <text:p text:style-name="P68"><text:span text:style-name="T22">RDF</text:span><text:span text:style-name="T15"> - uređene trojke ili četvorke</text:span></text:p>
        </text:list-item>
        <text:list-item>
          <text:p text:style-name="P68"><text:span text:style-name="T22">Labeled-property model</text:span><text:span text:style-name="T15"> - predstavljen je čvorovima, relacijama, property-ima i labelama. Čvorovi i relacije mogu biti označeni i mogu da sadrže podatke. Svaki podatakse pamti kao property (key – value par). Čvorovi mogu biti grupisani na osnovu labela.Relacije su uvek usmerene i mogu da sadrže dodatne podatke. </text:span></text:p>
        </text:list-item>
      </text:list>
      <text:p text:style-name="P45"><text:span text:style-name="T1">Neo4j koristi labeled-property model. Za razliku od relacionih baza, svi entiteti u graf bazama su </text:span><text:span text:style-name="T16">suštinski</text:span><text:span text:style-name="T1"> deo jedne strukture</text:span><text:span text:style-name="T16">, iako nisu logički povezani</text:span><text:span text:style-name="T1">. To znači da</text:span><text:span text:style-name="T16"> i pretraga jednog entiteta može biti neefikasna zbog broja čvorova ili relacija u grafu koji, iz ugla korisnika, nemaju veze sa rezultatom upita/pretrage.</text:span><text:span text:style-name="T18"> Zato se u novijim verzijama (4.3 i više) prilikom pravljenja grafa automatski kreira indeks koji se koristi za pretragu čvorova i relacija po labelama (dakle utiče na performanse maltene svih upita nad grafom).</text:span><text:span text:style-name="T51">[]</text:span><text:span text:style-name="T16"> </text:span><text:span text:style-name="T17">Kod relacionih baza se indeksi prave nad kolonom/a</text:span><text:span text:style-name="T18"> za</text:span><text:span text:style-name="T17"> konkretne tabele/entitet</text:span><text:span text:style-name="T18">e. </text:span><text:span text:style-name="T51">Relacione baze </text:span><text:span text:style-name="T18">su spomenute zato što su dosta rasprostranjene</text:span><text:span text:style-name="T19">,</text:span><text:span text:style-name="T18"> upitni jezik (Cypher) je p</text:span><text:span text:style-name="T19">ravljen da liči na SQL i uglavnom se koriste verzije B-stabla za indeksiranje, ali način izvršenja upita je potpuno drugačiji. </text:span></text:p>
      <text:h text:style-name="P65" text:outline-level="2"><text:bookmark-start text:name="__RefHeading___Toc38478_3731682282"/>Constraint<text:bookmark-end text:name="__RefHeading___Toc38478_3731682282"/></text:h>
      <text:p text:style-name="P4">Constraint <text:span text:style-name="T1">se koristi da bi se osigurao integritet podataka</text:span>.[1]<text:span text:style-name="T20"> Constraint može da se napravi nad određenim property-jem čvora ili relacije, pri čemu može da se naglasi i labela. Constraint, u zavisnosti od tipa, da osigura da je određen property/skup property-ja jedinstven ili da postoji (nije NULL) za čvorove/relacije sa tom labelom.</text:span></text:p>
      <text:p text:style-name="P18">Tipovi constrainta:</text:p>
      <text:list xml:id="list836220188" text:style-name="L2">
        <text:list-item>
          <text:p text:style-name="P69"><text:span text:style-name="T65">Unique node property</text:span> - property mora da bude jedinstven za određen tip čvora ili sve čvorove</text:p>
        </text:list-item>
        <text:list-item>
          <text:p text:style-name="P69"><text:span text:style-name="T65">Unique relationship property</text:span> - property mora da bude jedinstven za određen tip relacije ili sve relacije</text:p>
        </text:list-item>
        <text:list-item>
          <text:p text:style-name="P69"><text:span text:style-name="T65">Node property existence</text:span> - property mora da bude postoji za određen tip čvora ili sve čvorove</text:p>
        </text:list-item>
        <text:list-item>
          <text:p text:style-name="P69"><text:span text:style-name="T65">Relationship property existence</text:span><text:span text:style-name="T69"> - property mora da bude postoji za određen tip relacije ili sve relacije</text:span></text:p>
        </text:list-item>
        <text:list-item>
          <text:p text:style-name="P69"><text:soft-page-break/><text:span text:style-name="T65">Node key</text:span> - property mora da postoji<text:span text:style-name="T71"> i da bude jedinstven</text:span> za određen tip čvora ili sve čvorove</text:p>
        </text:list-item>
        <text:list-item>
          <text:p text:style-name="P70"><text:span text:style-name="T66">Relationship</text:span><text:span text:style-name="T65"> key</text:span> - property mora da postoji<text:span text:style-name="T71"> i da bude jedinstven</text:span> za određen tip <text:span text:style-name="T71">relacije</text:span> ili sve <text:span text:style-name="T71">relacije</text:span></text:p>
        </text:list-item>
      </text:list>
      <text:p text:style-name="P8"><text:span text:style-name="T69"><text:tab/>Napomena: poslednja tri constrainta su podržana samo u <text:tab/>Enterprise verziji.</text:span><text:span text:style-name="T52">[1]</text:span></text:p>
      <text:p text:style-name="P19"/>
      <text:p text:style-name="P9"><text:span text:style-name="T69">Dodavanje constraint-a će biti uspešno ako constraint ne postoji za taj property, ili skup property-ja</text:span><text:span text:style-name="T70">,</text:span><text:span text:style-name="T69"> i ako ne postoji drugi constraint</text:span><text:span text:style-name="T70"> ili indeks</text:span><text:span text:style-name="T69"> sa istim imenom.</text:span><text:span text:style-name="T53">[1]</text:span></text:p>
      <text:p text:style-name="P20">Nakon dodavanja constraint-a svaka operacija koja narušava integritet podataka (pravila koja su prethodno navedena) se neće uspešno završiti, što je korisno kod IMPORT, UPDATE/MERGE i DELETE operacija.</text:p>
      <text:p text:style-name="P9"><text:span text:style-name="T69">Sintaksa </text:span><text:span text:style-name="T70">za dodavanje</text:span><text:span text:style-name="T69"> constraint-</text:span><text:span text:style-name="T70">a</text:span><text:span text:style-name="T69"> je sledeća:</text:span></text:p>
      <text:p text:style-name="P5"><draw:frame draw:style-name="fr3" draw:name="Frame1" text:anchor-type="char" svg:x="1.727cm" svg:y="0.295cm" svg:width="13.547cm" draw:z-index="2"><draw:text-box fo:min-height="7.435cm"><text:p text:style-name="Slika"><draw:frame draw:style-name="fr6" draw:name="Image1" text:anchor-type="paragraph" svg:width="13.547cm" style:rel-width="100%" svg:height="7.435cm" style:rel-height="scale" draw:z-index="3"><draw:image xlink:href="Pictures/1000000000000200000001192BB0743363127266.png" xlink:type="simple" xlink:show="embed" xlink:actuate="onLoad" draw:mime-type="image/png"/></draw:frame>Slika <text:sequence text:ref-name="refSlika0" text:name="Slika" text:formula="ooow:Slika+1" style:num-format="1">1</text:sequence>: <text:span text:style-name="T46">Un</text:span><text:span text:style-name="T57">i</text:span><text:span text:style-name="T46">q</text:span><text:span text:style-name="T57">u</text:span><text:span text:style-name="T46">e</text:span><text:span text:style-name="T54"> node</text:span> constraint</text:p></draw:text-box></draw:frame></text:p>
      <text:p text:style-name="P5">Dodavanje constraint-a mo<text:span text:style-name="T1">že uticati i na performanse pretraživanja zato što je većina constraint-a (osim existence) zapravo implementirana kao indeks. Preporuka je da se constraint dodaje pre popunjavanja baze podacima zato što je, dodavanje constraint-a atomična operacija</text:span><text:span text:style-name="T25"> i uzrokovaće proveru svih podataka u bazi. Ako se ne naglase index provider (u OPTIONS klauzuli) i ime DBMS će sam odlučiti koji provider će biti korišćen (zapravo koji tip indeksa</text:span><text:span text:style-name="T33">, uglavnom range1.0</text:span><text:span text:style-name="T25">) i automatski će dodeliti ime.</text:span></text:p>
      <text:h text:style-name="P65" text:outline-level="2"><text:bookmark-start text:name="__RefHeading___Toc38480_3731682282"/><text:soft-page-break/>Tipovi indeksa<text:bookmark-end text:name="__RefHeading___Toc38480_3731682282"/></text:h>
      <text:p text:style-name="P46"><text:span text:style-name="T19">I</text:span><text:span text:style-name="T1">ndeksi se mogu napraviti za jedan ili više property-ja, pa se prema tome dele na:</text:span></text:p>
      <text:list xml:id="list3390874307" text:style-name="L3">
        <text:list-item>
          <text:p text:style-name="P71">Singl</text:p>
        </text:list-item>
        <text:list-item>
          <text:p text:style-name="P71">Kompozitni</text:p>
        </text:list-item>
      </text:list>
      <text:p text:style-name="P10">Kod kompozitnih indeksa treba voditi računa za <text:span text:style-name="T72">tri</text:span> stvari. Prvo je da <text:span text:style-name="T72">k</text:span>ompozitni indeks treba da se pravi za konkretan <text:span text:style-name="T65">WHERE</text:span> uslov. Ukoliko <text:span text:style-name="T72">je predikat za neki od property-ja, nad kojima je kreiran kompozitni indeks, izostvaljen indeks se neće koristiti.</text:span></text:p>
      <text:p text:style-name="P22">Druga bitna stvar je da kompozitni indeks podržava sve predikate u dostupne u Neo4j:</text:p>
      <text:list xml:id="list4115066923" text:style-name="L4">
        <text:list-item>
          <text:p text:style-name="P80"><text:span text:style-name="T34">equality check</text:span><text:span text:style-name="T1">: </text:span><text:span text:style-name="T40">n.prop </text:span><text:span text:style-name="T100">=</text:span><text:span text:style-name="T40"> value</text:span></text:p>
        </text:list-item>
        <text:list-item>
          <text:p text:style-name="P72"><text:span text:style-name="T85">list membership check</text:span>: <text:span text:style-name="T102">n.prop </text:span><text:span text:style-name="T94">IN</text:span><text:span text:style-name="T102"> list</text:span></text:p>
        </text:list-item>
        <text:list-item>
          <text:p text:style-name="P72"><text:span text:style-name="T85">existence check</text:span>: <text:span text:style-name="T102">n.prop </text:span><text:span text:style-name="T94">IS NOT</text:span><text:span text:style-name="T68"> NULL</text:span></text:p>
        </text:list-item>
        <text:list-item>
          <text:p text:style-name="P72"><text:span text:style-name="T85">range search</text:span>: <text:span text:style-name="T102">n.prop </text:span><text:span text:style-name="T97">&gt;</text:span><text:span text:style-name="T64"> value</text:span></text:p>
        </text:list-item>
        <text:list-item>
          <text:p text:style-name="P72"><text:span text:style-name="T85">prefix search</text:span>: <text:span text:style-name="T94">STARTS WITH</text:span></text:p>
          <text:p text:style-name="P73">Napomena: ako se koriste predikati <text:span text:style-name="T87">sufix search</text:span>(<text:span text:style-name="T65">ENDS WITH</text:span>) i <text:span text:style-name="T87">substirng search</text:span>(<text:span text:style-name="T65">SUBSTIRNG</text:span>), kompozitni indeks će se koristiti ali će ovi predikati biti planirani kao <text:span text:style-name="T88">existence check + filter</text:span>, kao i svi predikati nakon njih<text:span text:style-name="T58">[1]</text:span></text:p>
        </text:list-item>
      </text:list>
      <text:p text:style-name="P23">Treća bitna stvar kod kompozitnih indeksa je planiranje pretrage. Predikati mogu da budu planirani kao <text:span text:style-name="T84">existence check</text:span><text:span text:style-name="T59"> + filter</text:span><text:span text:style-name="T58">. </text:span><text:span text:style-name="T86">To bi trebalo izbeći kako bi se filtriranje radilo pomoću indeksa; što se može učiniti praćenjem sledećih restrikcija:</text:span></text:p>
      <text:list xml:id="list689735697" text:style-name="L5">
        <text:list-item>
          <text:p text:style-name="P74">Ako u uslovu postoje <text:span text:style-name="T84">equality check</text:span> i <text:span text:style-name="T85">list membership check</text:span> u indeksu property (ili više njih) mora biti na prvom mestu (mestima) u indeksu </text:p>
        </text:list-item>
        <text:list-item>
          <text:p text:style-name="P74">Najviše jedan <text:span text:style-name="T85">range search</text:span> ili <text:span text:style-name="T85">prefix search</text:span> predikat</text:p>
        </text:list-item>
        <text:list-item>
          <text:p text:style-name="P75">Može biti više<text:span text:style-name="T89"> </text:span><text:span text:style-name="T85">existence check</text:span> <text:span text:style-name="T89">predikata</text:span></text:p>
        </text:list-item>
        <text:list-item>
          <text:p text:style-name="P76">Svaki predikat nakon <text:span text:style-name="T85">range search</text:span>, <text:span text:style-name="T85">prefix search</text:span> ili <text:span text:style-name="T85">existence check</text:span> mora biti <text:span text:style-name="T85">existence check</text:span></text:p>
        </text:list-item>
      </text:list>
      <text:p text:style-name="P25"/>
      <text:p text:style-name="P28"/>
      <text:p text:style-name="P29"/>
      <text:p text:style-name="P40"/>
      <text:h text:style-name="P63" text:outline-level="1"><text:bookmark-start text:name="__RefHeading___Toc38520_3731682282"/>Indeksiranje<text:bookmark-end text:name="__RefHeading___Toc38520_3731682282"/></text:h>
      <text:p text:style-name="P58"><text:span text:style-name="T6">Ubrzanje može da se odnosi na vreme</text:span><text:span text:style-name="T7"> koje je potrebno za izvršenje upita</text:span><text:span text:style-name="T6">, međutim to je </text:span><text:span text:style-name="T7">vrlo često</text:span><text:span text:style-name="T6"> </text:span><text:span text:style-name="T7">nepouzdana</text:span><text:span text:style-name="T6"> metrika s obzirom na to da</text:span><text:span text:style-name="T7">:</text:span></text:p>
      <text:list xml:id="list3475675319" text:style-name="L6">
        <text:list-item>
          <text:p text:style-name="P81"><text:span text:style-name="T6">vrlo često na serveru/računaru DBMS</text:span><text:span text:style-name="T7"> nije</text:span><text:span text:style-name="T6"> jedina aplikacija koja se izvršava;</text:span><text:span text:style-name="T7"> </text:span></text:p>
        </text:list-item>
        <text:list-item>
          <text:p text:style-name="P77">podaci mogu da budu promenljivi, dakle vrlo često se ne zna unapred koliko podataka treba da bude vraćeno; </text:p>
        </text:list-item>
        <text:list-item>
          <text:p text:style-name="P81"><text:span text:style-name="T6">u mnogim slučajevima razlike u vremenu su rezultat optimizacija na hardverskom nivou (što nije predmet ovog rada)</text:span><text:span text:style-name="T7">; </text:span></text:p>
        </text:list-item>
        <text:list-item>
          <text:p text:style-name="P78">redosled izvršenja operacija/upita nekad može da utiče na upit koji se poslednji izvršio, ili tek treba da se izvrši.</text:p>
        </text:list-item>
      </text:list>
      <text:p text:style-name="P41"><text:span text:style-name="T6">Z</text:span><text:span text:style-name="T1">bog toga pouzdaniji podatak može biti broj pristupa disku</text:span><text:span text:style-name="T8">, pod uslovom da je svako čitanje/upis konstantno i da se koristi jedan disk</text:span><text:span text:style-name="T47">.</text:span><text:span text:style-name="T8"> </text:span></text:p>
      <text:p text:style-name="P41"><text:span text:style-name="T8">Ako uzmemo u obzir da DBMS treba najoptimalnije da izvrši upit, gotovo sigurno će pod određenim okolnostima pokušati da izbegne čitanje direktno sa diska ako podaci već postoje u memoriji. Neki planeri upita ne daju informaciju o broju čitanja sa diska (planer za Neo4j community edition, koji ovde koristimo, je takav primer)</text:span><text:span text:style-name="T48">[1]</text:span><text:span text:style-name="T8">, a korišćenje alata za monitoring bi potencijalno </text:span><text:span text:style-name="T103">mog</text:span><text:span text:style-name="T104">а</text:span><text:span text:style-name="T103">o</text:span><text:span text:style-name="T8"> da utiče na performanse. Zato se ova metrika neće koristiti</text:span><text:span text:style-name="T9"> u nastavku. </text:span></text:p>
      <text:p text:style-name="P41"><text:span text:style-name="T9"><text:s/>- DBhit</text:span><text:span text:style-name="T60">[1]</text:span><text:span text:style-name="T9">. </text:span></text:p>
      <text:p text:style-name="P15"><text:span text:style-name="T91">Za analizu upita u biće korišćena komanda PROFILE</text:span><text:span text:style-name="T90">. </text:span><text:span text:style-name="T91">Osim vremena izvršenja upita </text:span></text:p>
      <text:p text:style-name="P14">Ovo poglavlje sadrži primere koji ilustruju slučajeve kada je korisno koristiti određene tipove indeksa<text:span text:style-name="T90">. Indeksi služe za ubrzanje upita; u svakom primeru </text:span><text:span text:style-name="T91">će biti naglašeno da li je indeksiranje doprinelo ubrzanju i na osnovu koje metrike se došlo do tog zaključka korišćena. </text:span></text:p>
      <text:p text:style-name="P47"><text:span text:style-name="T26">Skup podataka</text:span><text:span text:style-name="T61"> koji</text:span><text:span text:style-name="T35"> će biti korišćen u primerima</text:span><text:span text:style-name="T26"> je javno dostupan na github repozitorijumu</text:span><text:span text:style-name="Strong_20_Emphasis"> neo4j-graph-examples/</text:span><text:span text:style-name="Strong_20_Emphasis"><text:span text:style-name="T28">recommendations</text:span></text:span><text:span text:style-name="Strong_20_Emphasis"><text:span text:style-name="T56">[4]</text:span></text:span><text:span text:style-name="T28">.</text:span><text:span text:style-name="T28"><text:note text:id="ftn1" text:note-class="footnote"><text:note-citation>1</text:note-citation><text:note-body><text:p text:style-name="P1">Za kreiranje baze, izvr<text:span text:style-name="T1">šenje i analizu upita korišćen je Neo4j</text:span><text:span text:style-name="T73"> Sandbox[5]</text:span></text:p></text:note-body></text:note></text:span><text:span text:style-name="T55"> Model baze </text:span><text:span text:style-name="T26">ima nekoliko tipova čvorova. Korisnika može da oceni film. U kreiranju filma, koji pripada određenom žanru, učestvuju ljudi kao glumci i/ili režiseri(Slika </text:span><text:span text:style-name="T30">2</text:span><text:span text:style-name="T26">).</text:span></text:p>
      <text:p text:style-name="P11"><draw:frame draw:style-name="fr3" draw:name="Frame2" text:anchor-type="char" svg:x="0.101cm" svg:y="0.609cm" svg:width="16.801cm" draw:z-index="4"><draw:text-box fo:min-height="13.441cm"><text:p text:style-name="Slika"><draw:frame draw:style-name="fr6" draw:name="Image2" text:anchor-type="paragraph" svg:width="16.801cm" style:rel-width="100%" svg:height="13.441cm" style:rel-height="scale" draw:z-index="5"><draw:image xlink:href="Pictures/100000000000027B000001FC6706694644269AA9.png" xlink:type="simple" xlink:show="embed" xlink:actuate="onLoad" draw:mime-type="image/png"/></draw:frame>Slika <text:sequence text:ref-name="refSlika1" text:name="Slika" text:formula="ooow:Slika+1" style:num-format="1">2</text:sequence>: Model <text:span text:style-name="T1">recom</text:span><text:span text:style-name="T27">m</text:span><text:span text:style-name="T1">endations</text:span> baze</text:p></draw:text-box></draw:frame><text:soft-page-break/></text:p>
      <text:p text:style-name="P16"/>
      <text:p text:style-name="P12">Korišćenjem komandi za prikazivanje indeksa i constraint-a može se uočiti <text:span text:style-name="T74">da</text:span></text:p>
      <text:list xml:id="list607497605" text:style-name="L7">
        <text:list-item>
          <text:p text:style-name="P82">U bazi postoji LOOKUP index za <text:span text:style-name="T1">čvorove, </text:span><text:span text:style-name="T31">ali ne postoji index za relacije - treba ga dodati</text:span></text:p>
        </text:list-item>
      </text:list>
      <text:list xml:id="list138433822" text:style-name="L8">
        <text:list-item>
          <text:p text:style-name="P79">Trenutno u bazi postoje samo UNIQUENESS constraint-i<text:span text:style-name="T76"> (Slika 3)</text:span> i svaki od njih ima <text:span text:style-name="T75">RANGE indeks</text:span><text:span text:style-name="T76"> (Slike 2)</text:span><text:span text:style-name="T77">, koji može da bude koristan za operator jednakosti, meuđutim treba razmotriti da li TEXT index donosi benefit u tim slučajevima zato što su property-ji (o kojima je reč) stringovi</text:span></text:p>
        </text:list-item>
      </text:list>
      <text:p text:style-name="P12"/>
      <text:p text:style-name="P12"><draw:frame draw:style-name="fr3" draw:name="Frame3" text:anchor-type="char" svg:x="0cm" svg:y="0.185cm" svg:width="17cm" draw:z-index="6"><draw:text-box fo:min-height="5.519cm"><text:p text:style-name="Slika"><draw:frame draw:style-name="fr6" draw:name="Image3" text:anchor-type="paragraph" svg:width="17cm" style:rel-width="100%" svg:height="5.519cm" style:rel-height="scale" draw:z-index="7"><draw:image xlink:href="Pictures/10000000000005BA000001DC130B82D6F0E3313A.png" xlink:type="simple" xlink:show="embed" xlink:actuate="onLoad" draw:mime-type="image/png"/></draw:frame>Slika <text:sequence text:ref-name="refSlika2" text:name="Slika" text:formula="ooow:Slika+1" style:num-format="1">3</text:sequence>: Constraint-i <text:span text:style-name="T29">koje je generisalo</text:span> <text:span text:style-name="T29">okruženje</text:span></text:p></draw:text-box></draw:frame><text:soft-page-break/></text:p>
      <text:p text:style-name="P12"><draw:frame draw:style-name="fr2" draw:name="Frame4" text:anchor-type="char" svg:width="17cm" draw:z-index="8"><draw:text-box fo:min-height="7.163cm"><text:p text:style-name="Slika"><draw:frame draw:style-name="fr6" draw:name="Image4" text:anchor-type="paragraph" svg:width="17cm" style:rel-width="100%" svg:height="7.163cm" style:rel-height="scale" draw:z-index="9"><draw:image xlink:href="Pictures/1000000000000690000002C4B9C76C8C86DBDB50.png" xlink:type="simple" xlink:show="embed" xlink:actuate="onLoad" draw:mime-type="image/png"/></draw:frame>Slika <text:sequence text:ref-name="refSlika3" text:name="Slika" text:formula="ooow:Slika+1" style:num-format="1">4</text:sequence>: Indeksi koje je generisalo okruženje</text:p></draw:text-box></draw:frame></text:p>
      <text:h text:style-name="P66" text:outline-level="2"><text:bookmark-start text:name="__RefHeading___Toc3100_4290455764"/>Primer lookup indeksa<text:bookmark-end text:name="__RefHeading___Toc3100_4290455764"/></text:h>
      <text:p text:style-name="P17">Kada se uporedi broj čvorova koji predstavljaju film (Slika 5) </text:p>
      <text:p text:style-name="P17"><draw:frame draw:style-name="fr1" draw:name="Frame5" text:anchor-type="char" svg:x="2.879cm" svg:y="0.388cm" svg:width="11.245cm" draw:z-index="10"><draw:text-box fo:min-height="3.757cm"><text:p text:style-name="Slika"><draw:frame draw:style-name="fr5" draw:name="Image5" text:anchor-type="paragraph" svg:x="0cm" svg:y="-0.506cm" svg:width="11.245cm" style:rel-width="100%" svg:height="3.757cm" style:rel-height="scale" draw:z-index="11"><draw:image xlink:href="Pictures/10000000000001A90000008EA583D93712AF255F.png" xlink:type="simple" xlink:show="embed" xlink:actuate="onLoad" draw:mime-type="image/png"/></draw:frame>Slika <text:sequence text:ref-name="refSlika4" text:name="Slika" text:formula="ooow:Slika+1" style:num-format="1">5</text:sequence>: Broj filmova</text:p></draw:text-box></draw:frame></text:p>
      <text:p text:style-name="P55"><text:span text:style-name="T1">sa brojem </text:span><text:span text:style-name="T32">DbHit-ova</text:span><text:span text:style-name="T1"> </text:span><text:span text:style-name="T32">kada se pretražuju filmovi:</text:span></text:p>
      <text:p text:style-name="P52"><text:span text:style-name="T79">PROFILE</text:span><text:span text:style-name="T81"> </text:span><text:span text:style-name="T79">MATCH</text:span><text:span text:style-name="T81"> </text:span><text:span text:style-name="T83">(</text:span><text:span text:style-name="T81">p</text:span><text:span text:style-name="T83">:</text:span><text:span text:style-name="T81">Person</text:span><text:span text:style-name="T83">)-[:</text:span><text:span text:style-name="T81">ACTED_IN</text:span><text:span text:style-name="T83">]-&gt;(</text:span><text:span text:style-name="T81">m</text:span><text:span text:style-name="T83">:</text:span><text:span text:style-name="T81">Movie</text:span><text:span text:style-name="T83">)&lt;-[:</text:span><text:span text:style-name="T81">DIRECTED</text:span><text:span text:style-name="T83">]-(</text:span><text:span text:style-name="T81">p2</text:span><text:span text:style-name="T83">:</text:span><text:span text:style-name="T81">Person</text:span><text:span text:style-name="T83">)</text:span></text:p>
      <text:p text:style-name="P51"><text:span text:style-name="T78">WHERE</text:span><text:span text:style-name="T80"> p</text:span><text:span text:style-name="T82">.</text:span><text:span text:style-name="T80">name </text:span><text:span text:style-name="T82">=</text:span><text:span text:style-name="T80"> p2</text:span><text:span text:style-name="T82">.</text:span><text:span text:style-name="T80">name</text:span></text:p>
      <text:p text:style-name="P51"><text:soft-page-break/><text:span text:style-name="T78">RETURN</text:span><text:span text:style-name="T80"> p</text:span></text:p>
      <text:p text:style-name="P26"/>
      <text:p text:style-name="P26"><draw:frame draw:style-name="fr4" draw:name="Image6" text:anchor-type="char" svg:x="0cm" svg:y="0.39cm" svg:width="17cm" svg:height="6.137cm" draw:z-index="12"><draw:image xlink:href="Pictures/1000000000000582000001FD63727F698BD2A4E2.png" xlink:type="simple" xlink:show="embed" xlink:actuate="onLoad" draw:mime-type="image/png"/></draw:frame></text:p>
      <text:p text:style-name="P27">Da ne postoji taj indeks, ceo graf bi morao da se pretraži još u prvom koraku, kao ovde:</text:p>
      <text:p text:style-name="P53"><text:span text:style-name="T78">PROFILE</text:span><text:span text:style-name="T80"> </text:span><text:span text:style-name="T78">MATCH</text:span><text:span text:style-name="T80"> </text:span><text:span text:style-name="T82">()-[</text:span><text:span text:style-name="T80">r</text:span><text:span text:style-name="T82">:</text:span><text:span text:style-name="T80">DIRECTED</text:span><text:span text:style-name="T82">]-()</text:span><text:span text:style-name="T80"> </text:span><text:span text:style-name="T78">RETURN</text:span><text:span text:style-name="T80"> r</text:span></text:p>
      <text:p text:style-name="P56"/>
      <text:p text:style-name="P56"><draw:frame draw:style-name="fr4" draw:name="Image7" text:anchor-type="char" svg:x="0cm" svg:y="0.291cm" svg:width="17cm" svg:height="4.662cm" draw:z-index="13"><draw:image xlink:href="Pictures/10000000000005660000017B7BCEFBEC50A8EA4D.png" xlink:type="simple" xlink:show="embed" xlink:actuate="onLoad" draw:mime-type="image/png"/></draw:frame></text:p>
      <text:p text:style-name="P6">Nakon dodavanja indeksa plan izgleda dosta druga<text:span text:style-name="T1">čije</text:span>:</text:p>
      <text:p text:style-name="P54"><text:span text:style-name="T78">CREATE</text:span><text:span text:style-name="T80"> LOOKUP </text:span><text:span text:style-name="T78">INDEX</text:span><text:span text:style-name="T80"> rel_type_lookup_index </text:span><text:span text:style-name="T78">FOR</text:span><text:span text:style-name="T80"> </text:span><text:span text:style-name="T82">()-[</text:span><text:span text:style-name="T80">r</text:span><text:span text:style-name="T82">]-()</text:span><text:span text:style-name="T80"> </text:span><text:span text:style-name="T78">ON</text:span><text:span text:style-name="T80"> EACH type</text:span><text:span text:style-name="T82">(</text:span><text:span text:style-name="T80">r</text:span><text:span text:style-name="T82">)</text:span></text:p>
      <text:p text:style-name="P6"/>
      <text:p text:style-name="P6"><draw:frame draw:style-name="fr4" draw:name="Image8" text:anchor-type="char" svg:x="-0.072cm" svg:y="0.018cm" svg:width="17cm" svg:height="5.466cm" draw:z-index="14"><draw:image xlink:href="Pictures/1000000000000574000001C13DA182C4A2277B3D.png" xlink:type="simple" xlink:show="embed" xlink:actuate="onLoad" draw:mime-type="image/png"/></draw:frame></text:p>
      <text:p text:style-name="P21"><text:soft-page-break/>Zato je preporuka da se ovi indeksi ne brišu; svaki graf bi trebalo na početku da ima ova dva indeksa (ako se koristi nova verzija). </text:p>
      <text:h text:style-name="P67" text:outline-level="2"><text:bookmark-start text:name="__RefHeading___Toc3102_4290455764"/>Primer full-text indeksa<text:bookmark-end text:name="__RefHeading___Toc3102_4290455764"/></text:h>
      <text:p text:style-name="P24"/>
      <text:h text:style-name="P64" text:outline-level="1"><text:bookmark-start text:name="__RefHeading___Toc19124_3731682282"/>Reference<text:bookmark-end text:name="__RefHeading___Toc19124_3731682282"/></text:h>
      <text:p text:style-name="P3">[1] Neo4j Cypher Manual <text:a xlink:type="simple" xlink:href="https://neo4j.com/docs/cypher-manual/current/execution-plans/" text:style-name="Internet_20_link" text:visited-style-name="Visited_20_Internet_20_Link"><text:span text:style-name="T21">https://neo4j.com/docs/cypher-manual/</text:span></text:a><text:a xlink:type="simple" xlink:href="https://neo4j.com/docs/cypher-manual/current/execution-plans/" text:style-name="Internet_20_link" text:visited-style-name="Visited_20_Internet_20_Link"><text:span text:style-name="T24">5</text:span></text:a><text:a xlink:type="simple" xlink:href="https://neo4j.com/docs/cypher-manual/current/execution-plans/" text:style-name="Internet_20_link" text:visited-style-name="Visited_20_Internet_20_Link"><text:span text:style-name="T21">/execution-plans/</text:span></text:a></text:p>
      <text:p text:style-name="P3"/>
      <text:p text:style-name="P3">[2] <text:span text:style-name="T10">What is DBMS? </text:span><text:a xlink:type="simple" xlink:href="https://www.appdynamics.com/topics/database-management-systems" text:style-name="Internet_20_link" text:visited-style-name="Visited_20_Internet_20_Link"><text:span text:style-name="T65">https://www.appdynamics.com/topics/database-management-systems</text:span></text:a></text:p>
      <text:p text:style-name="P3"/>
      <text:p text:style-name="P3">[3] <text:span text:style-name="T14">Overview of storage and indexing </text:span><text:a xlink:type="simple" xlink:href="https://coursys.sfu.ca/2016su-cmpt-354-d1/pages/MYCH8.pdf/view" text:style-name="Internet_20_link" text:visited-style-name="Visited_20_Internet_20_Link"><text:span text:style-name="T23">https://coursys.sfu.ca/2016su-cmpt-354-d1/pages/MYCH8.pdf/view</text:span></text:a></text:p>
      <text:p text:style-name="P3"/>
      <text:p text:style-name="P3">[4] <text:span text:style-name="T26">Recommendation dataset </text:span><text:a xlink:type="simple" xlink:href="https://github.com/neo4j-graph-examples/recommendations" text:style-name="Internet_20_link" text:visited-style-name="Visited_20_Internet_20_Link"><text:span text:style-name="T65">github.com/neo4j-graph-examples/recommendations</text:span></text:a></text:p>
      <text:p text:style-name="P3"/>
      <text:p text:style-name="P2">[5] Neo4j Sandbox <text:a xlink:type="simple" xlink:href="https://neo4j.com/sandbox/" text:style-name="Internet_20_link" text:visited-style-name="Visited_20_Internet_20_Link"><text:span text:style-name="T65">https://neo4j.com/sandbox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1" fo:font-family="'Liberation Mono'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Mono1" fo:font-family="'Liberation Mono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SimSun1" style:font-family-asian="NSimSun" style:font-family-generic-asian="system" style:font-pitch-asian="variable" style:font-size-asian="28pt" style:font-name-complex="Lucida Sans1" style:font-family-complex="'Lucida Sans'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Line_20_numbering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2T23:06:41.736000000</meta:creation-date>
    <dc:date>2024-04-20T16:33:06.966000000</dc:date>
    <meta:editing-duration>P1DT22H53M23S</meta:editing-duration>
    <meta:editing-cycles>15</meta:editing-cycles>
    <meta:generator>LibreOffice/7.3.5.2$Windows_X86_64 LibreOffice_project/184fe81b8c8c30d8b5082578aee2fed2ea847c01</meta:generator>
    <meta:document-statistic meta:table-count="0" meta:image-count="10" meta:object-count="0" meta:page-count="13" meta:paragraph-count="102" meta:word-count="1717" meta:character-count="11199" meta:non-whitespace-character-count="9579"/>
  </office:meta>
</office:document-meta>
</file>