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60000017B36275B4AEE5D7D2D.png" manifest:media-type="image/png"/>
  <manifest:file-entry manifest:full-path="Pictures/1000000000000582000001FD86DD8A6C4E13FDBD.png" manifest:media-type="image/png"/>
  <manifest:file-entry manifest:full-path="Pictures/10000000000001A90000008EB9251783390F860D.png" manifest:media-type="image/png"/>
  <manifest:file-entry manifest:full-path="Pictures/10000000000005BA000001DC3B1383D23C76AEA8.png" manifest:media-type="image/png"/>
  <manifest:file-entry manifest:full-path="Pictures/100000000000027B000001FCA96CCC01ECF13597.png" manifest:media-type="image/png"/>
  <manifest:file-entry manifest:full-path="Pictures/100000000000020000000119EA64FE48FE09386E.png" manifest:media-type="image/png"/>
  <manifest:file-entry manifest:full-path="Pictures/1000000000000574000001C19D0B1DE83F53BCAB.png" manifest:media-type="image/png"/>
  <manifest:file-entry manifest:full-path="Pictures/10000000000000E6000000E15BCFE3BBC3FB7146.png" manifest:media-type="image/png"/>
  <manifest:file-entry manifest:full-path="Pictures/1000000000000690000002C45639B0D12C6C5D89.png" manifest:media-type="image/png"/>
  <manifest:file-entry manifest:full-path="Pictures/1000000000000107000000ECA11EF1A87FCC6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fo:language="en" fo:country="US" officeooo:rsid="00377f03" officeooo:paragraph-rsid="00377f03"/>
    </style:style>
    <style:style style:name="P2" style:family="paragraph" style:parent-style-name="Standard">
      <style:text-properties fo:language="en" fo:country="US" officeooo:rsid="00377f03" officeooo:paragraph-rsid="00377f03"/>
    </style:style>
    <style:style style:name="P3" style:family="paragraph" style:parent-style-name="Standard">
      <style:text-properties fo:language="en" fo:country="US" officeooo:rsid="00193d19" officeooo:paragraph-rsid="00193d19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5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6" style:family="paragraph" style:parent-style-name="Standard">
      <style:text-properties style:font-name="Liberation Sans" fo:language="de" fo:country="DE" officeooo:paragraph-rsid="00121b28"/>
    </style:style>
    <style:style style:name="P7" style:family="paragraph" style:parent-style-name="Standard">
      <style:text-properties style:font-name="Liberation Sans" officeooo:paragraph-rsid="00121b28"/>
    </style:style>
    <style:style style:name="P8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121b28" officeooo:paragraph-rsid="00121b2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121b28" officeooo:paragraph-rsid="00121b28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fo:background-color="#fffffe"/>
    </style:style>
    <style:style style:name="P14" style:family="paragraph" style:parent-style-name="Standard">
      <style:text-properties fo:color="#000000" officeooo:rsid="003ffaac" officeooo:paragraph-rsid="003ffaac" fo:background-color="#fffffe"/>
    </style:style>
    <style:style style:name="P15" style:family="paragraph" style:parent-style-name="Standard">
      <style:text-properties fo:color="#000000" officeooo:rsid="0040270f" officeooo:paragraph-rsid="0040270f" fo:background-color="#fffffe"/>
    </style:style>
    <style:style style:name="P16" style:family="paragraph" style:parent-style-name="Standard">
      <style:text-properties fo:color="#000000" fo:language="en" fo:country="US" officeooo:rsid="00404dc6" officeooo:paragraph-rsid="00404dc6" fo:background-color="#fffffe"/>
    </style:style>
    <style:style style:name="P17" style:family="paragraph" style:parent-style-name="Text_20_body">
      <style:text-properties fo:language="en" fo:country="US" officeooo:rsid="00275d74" officeooo:paragraph-rsid="00275d74"/>
    </style:style>
    <style:style style:name="P18" style:family="paragraph" style:parent-style-name="Text_20_body">
      <style:text-properties fo:language="en" fo:country="US" officeooo:rsid="002d282d" officeooo:paragraph-rsid="002d282d"/>
    </style:style>
    <style:style style:name="P19" style:family="paragraph" style:parent-style-name="Text_20_body">
      <style:text-properties fo:language="en" fo:country="US" officeooo:rsid="002d282d" officeooo:paragraph-rsid="00630498"/>
    </style:style>
    <style:style style:name="P20" style:family="paragraph" style:parent-style-name="Text_20_body">
      <style:text-properties fo:language="en" fo:country="US" officeooo:rsid="00404dc6" officeooo:paragraph-rsid="00404dc6"/>
    </style:style>
    <style:style style:name="P21" style:family="paragraph" style:parent-style-name="Text_20_body">
      <style:text-properties officeooo:paragraph-rsid="00121b28"/>
    </style:style>
    <style:style style:name="P22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23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24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25" style:family="paragraph" style:parent-style-name="Text_20_body">
      <style:text-properties style:rfc-language-tag="sr-Latn-RS" fo:language="sr" fo:script="Latn" fo:country="RS" officeooo:rsid="0033b3e7" officeooo:paragraph-rsid="0033b3e7"/>
    </style:style>
    <style:style style:name="P26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27" style:family="paragraph" style:parent-style-name="Text_20_body">
      <style:text-properties style:rfc-language-tag="sr-Latn-RS" fo:language="sr" fo:script="Latn" fo:country="RS" officeooo:rsid="0022099e" officeooo:paragraph-rsid="0022099e"/>
    </style:style>
    <style:style style:name="P28" style:family="paragraph" style:parent-style-name="Text_20_body">
      <style:text-properties style:rfc-language-tag="sr-Latn-RS" fo:language="sr" fo:script="Latn" fo:country="RS" officeooo:rsid="003301a6" officeooo:paragraph-rsid="003301a6"/>
    </style:style>
    <style:style style:name="P29" style:family="paragraph" style:parent-style-name="Text_20_body">
      <style:text-properties style:rfc-language-tag="sr-Latn-RS" fo:language="sr" fo:script="Latn" fo:country="RS" officeooo:rsid="003301a6" officeooo:paragraph-rsid="00520e81"/>
    </style:style>
    <style:style style:name="P30" style:family="paragraph" style:parent-style-name="Text_20_body">
      <style:text-properties style:rfc-language-tag="sr-Latn-RS" fo:language="sr" fo:script="Latn" fo:country="RS" officeooo:rsid="003ffaac" officeooo:paragraph-rsid="0033b3e7"/>
    </style:style>
    <style:style style:name="P31" style:family="paragraph" style:parent-style-name="Text_20_body">
      <style:text-properties style:rfc-language-tag="sr-Latn-RS" fo:language="sr" fo:script="Latn" fo:country="RS" officeooo:rsid="003ffaac" officeooo:paragraph-rsid="003ffaac"/>
    </style:style>
    <style:style style:name="P32" style:family="paragraph" style:parent-style-name="Text_20_body">
      <style:text-properties style:rfc-language-tag="sr-Latn-RS" fo:language="sr" fo:script="Latn" fo:country="RS" officeooo:rsid="00289180" officeooo:paragraph-rsid="00289180"/>
    </style:style>
    <style:style style:name="P33" style:family="paragraph" style:parent-style-name="Text_20_body">
      <style:text-properties style:rfc-language-tag="sr-Latn-RS" fo:language="sr" fo:script="Latn" fo:country="RS" fo:font-weight="normal" officeooo:rsid="002a3aff" officeooo:paragraph-rsid="002a3aff" style:font-weight-asian="normal" style:font-weight-complex="normal"/>
    </style:style>
    <style:style style:name="P34" style:family="paragraph" style:parent-style-name="Text_20_body">
      <style:text-properties style:rfc-language-tag="sr-Latn-RS" fo:language="sr" fo:script="Latn" fo:country="RS" fo:font-weight="normal" officeooo:rsid="002af43b" officeooo:paragraph-rsid="002af43b" style:font-weight-asian="normal" style:font-weight-complex="normal"/>
    </style:style>
    <style:style style:name="P35" style:family="paragraph" style:parent-style-name="Text_20_body">
      <style:text-properties style:rfc-language-tag="sr-Latn-RS" fo:language="sr" fo:script="Latn" fo:country="RS" officeooo:rsid="0040ac5c" officeooo:paragraph-rsid="0040ac5c"/>
    </style:style>
    <style:style style:name="P36" style:family="paragraph" style:parent-style-name="Text_20_body">
      <style:text-properties style:rfc-language-tag="sr-Latn-RS" fo:language="sr" fo:script="Latn" fo:country="RS" officeooo:rsid="00463b0d" officeooo:paragraph-rsid="00463b0d"/>
    </style:style>
    <style:style style:name="P37" style:family="paragraph" style:parent-style-name="Text_20_body">
      <style:text-properties style:rfc-language-tag="sr-Latn-RS" fo:language="sr" fo:script="Latn" fo:country="RS" officeooo:rsid="004729fe" officeooo:paragraph-rsid="0049000a"/>
    </style:style>
    <style:style style:name="P38" style:family="paragraph" style:parent-style-name="Text_20_body">
      <style:text-properties style:rfc-language-tag="sr-Latn-RS" fo:language="sr" fo:script="Latn" fo:country="RS" officeooo:rsid="004256f3" officeooo:paragraph-rsid="004256f3"/>
    </style:style>
    <style:style style:name="P39" style:family="paragraph" style:parent-style-name="Text_20_body">
      <style:text-properties style:rfc-language-tag="sr-Latn-RS" fo:language="sr" fo:script="Latn" fo:country="RS" officeooo:rsid="0040270f" officeooo:paragraph-rsid="003ffaac"/>
    </style:style>
    <style:style style:name="P40" style:family="paragraph" style:parent-style-name="Text_20_body">
      <style:text-properties style:rfc-language-tag="sr-Latn-RS" fo:language="sr" fo:script="Latn" fo:country="RS" officeooo:rsid="0040270f" officeooo:paragraph-rsid="0040270f"/>
    </style:style>
    <style:style style:name="P41" style:family="paragraph" style:parent-style-name="Text_20_body">
      <style:text-properties style:rfc-language-tag="sr-Latn-RS" fo:language="sr" fo:script="Latn" fo:country="RS" officeooo:rsid="005a8fe0" officeooo:paragraph-rsid="005a8fe0"/>
    </style:style>
    <style:style style:name="P42" style:family="paragraph" style:parent-style-name="Text_20_body">
      <style:text-properties officeooo:rsid="00184a9a" officeooo:paragraph-rsid="001a7f49"/>
    </style:style>
    <style:style style:name="P43" style:family="paragraph" style:parent-style-name="Text_20_body">
      <style:text-properties officeooo:rsid="00184a9a" officeooo:paragraph-rsid="00520e81"/>
    </style:style>
    <style:style style:name="P44" style:family="paragraph" style:parent-style-name="Text_20_body">
      <style:text-properties officeooo:rsid="001984a4" officeooo:paragraph-rsid="001984a4"/>
    </style:style>
    <style:style style:name="P45" style:family="paragraph" style:parent-style-name="Text_20_body">
      <style:text-properties officeooo:rsid="001c00a9" officeooo:paragraph-rsid="001c00a9"/>
    </style:style>
    <style:style style:name="P46" style:family="paragraph" style:parent-style-name="Text_20_body">
      <style:text-properties officeooo:rsid="001d6376" officeooo:paragraph-rsid="001d6376"/>
    </style:style>
    <style:style style:name="P47" style:family="paragraph" style:parent-style-name="Text_20_body">
      <style:text-properties officeooo:rsid="0022099e" officeooo:paragraph-rsid="0022099e"/>
    </style:style>
    <style:style style:name="P48" style:family="paragraph" style:parent-style-name="Text_20_body">
      <style:text-properties officeooo:rsid="002fe7ce" officeooo:paragraph-rsid="002fe7ce"/>
    </style:style>
    <style:style style:name="P49" style:family="paragraph" style:parent-style-name="Text_20_body">
      <style:text-properties officeooo:paragraph-rsid="00377f03"/>
    </style:style>
    <style:style style:name="P50" style:family="paragraph" style:parent-style-name="Text_20_body">
      <style:text-properties officeooo:rsid="003ffaac" officeooo:paragraph-rsid="003ffaac"/>
    </style:style>
    <style:style style:name="P51" style:family="paragraph" style:parent-style-name="Text_20_body">
      <style:text-properties officeooo:rsid="0040270f" officeooo:paragraph-rsid="0040270f"/>
    </style:style>
    <style:style style:name="P52" style:family="paragraph" style:parent-style-name="Text_20_body">
      <style:text-properties officeooo:rsid="00209ca8" officeooo:paragraph-rsid="00502a80"/>
    </style:style>
    <style:style style:name="P53" style:family="paragraph" style:parent-style-name="Text_20_body">
      <style:text-properties officeooo:rsid="00174d6e" officeooo:paragraph-rsid="00520e81"/>
    </style:style>
    <style:style style:name="P54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59" style:family="paragraph" style:parent-style-name="Heading_20_1">
      <style:paragraph-properties fo:break-before="page"/>
      <style:text-properties officeooo:rsid="00121b28" officeooo:paragraph-rsid="00121b28"/>
    </style:style>
    <style:style style:name="P60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61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62" style:family="paragraph" style:parent-style-name="Heading_20_1">
      <style:paragraph-properties fo:break-before="page"/>
      <style:text-properties style:rfc-language-tag="sr-Latn-RS" fo:language="sr" fo:script="Latn" fo:country="RS" officeooo:rsid="003301a6" officeooo:paragraph-rsid="003301a6"/>
    </style:style>
    <style:style style:name="P63" style:family="paragraph" style:parent-style-name="Heading_20_1">
      <style:paragraph-properties fo:break-before="page"/>
      <style:text-properties fo:language="en" fo:country="US" officeooo:rsid="00394547" officeooo:paragraph-rsid="00394547"/>
    </style:style>
    <style:style style:name="P64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65" style:family="paragraph" style:parent-style-name="Heading_20_2">
      <style:text-properties style:rfc-language-tag="sr-Latn-RS" fo:language="sr" fo:script="Latn" fo:country="RS" officeooo:rsid="003ffaac" officeooo:paragraph-rsid="003ffaac"/>
    </style:style>
    <style:style style:name="P66" style:family="paragraph" style:parent-style-name="Heading_20_2">
      <style:text-properties style:rfc-language-tag="sr-Latn-RS" fo:language="sr" fo:script="Latn" fo:country="RS" officeooo:rsid="004256f3" officeooo:paragraph-rsid="004256f3"/>
    </style:style>
    <style:style style:name="P67" style:family="paragraph" style:parent-style-name="Text_20_body" style:list-style-name="L1">
      <style:text-properties officeooo:paragraph-rsid="0022099e"/>
    </style:style>
    <style:style style:name="P68" style:family="paragraph" style:parent-style-name="Text_20_body" style:list-style-name="L2">
      <style:text-properties style:rfc-language-tag="sr-Latn-RS" fo:language="sr" fo:script="Latn" fo:country="RS" officeooo:rsid="00289180" officeooo:paragraph-rsid="00289180"/>
    </style:style>
    <style:style style:name="P69" style:family="paragraph" style:parent-style-name="Text_20_body" style:list-style-name="L2">
      <style:text-properties style:rfc-language-tag="sr-Latn-RS" fo:language="sr" fo:script="Latn" fo:country="RS" officeooo:rsid="00289180" officeooo:paragraph-rsid="002a3aff"/>
    </style:style>
    <style:style style:name="P70" style:family="paragraph" style:parent-style-name="Text_20_body" style:list-style-name="L3">
      <style:text-properties style:rfc-language-tag="sr-Latn-RS" fo:language="sr" fo:script="Latn" fo:country="RS" officeooo:rsid="002fe7ce" officeooo:paragraph-rsid="002fe7ce"/>
    </style:style>
    <style:style style:name="P71" style:family="paragraph" style:parent-style-name="Text_20_body" style:list-style-name="L4">
      <style:text-properties style:rfc-language-tag="sr-Latn-RS" fo:language="sr" fo:script="Latn" fo:country="RS" officeooo:rsid="00463b0d" officeooo:paragraph-rsid="00463b0d"/>
    </style:style>
    <style:style style:name="P72" style:family="paragraph" style:parent-style-name="Text_20_body" style:list-style-name="L4">
      <style:text-properties style:rfc-language-tag="sr-Latn-RS" fo:language="sr" fo:script="Latn" fo:country="RS" fo:font-style="italic" officeooo:rsid="004729fe" officeooo:paragraph-rsid="004729fe" style:font-style-asian="italic" style:font-style-complex="italic"/>
    </style:style>
    <style:style style:name="P73" style:family="paragraph" style:parent-style-name="Text_20_body" style:list-style-name="L5">
      <style:text-properties style:rfc-language-tag="sr-Latn-RS" fo:language="sr" fo:script="Latn" fo:country="RS" officeooo:rsid="0049000a" officeooo:paragraph-rsid="0049000a"/>
    </style:style>
    <style:style style:name="P74" style:family="paragraph" style:parent-style-name="Text_20_body" style:list-style-name="L5">
      <style:text-properties style:rfc-language-tag="sr-Latn-RS" fo:language="sr" fo:script="Latn" fo:country="RS" officeooo:rsid="0049000a" officeooo:paragraph-rsid="0049e2d6"/>
    </style:style>
    <style:style style:name="P75" style:family="paragraph" style:parent-style-name="Text_20_body" style:list-style-name="L5">
      <style:text-properties style:rfc-language-tag="sr-Latn-RS" fo:language="sr" fo:script="Latn" fo:country="RS" officeooo:rsid="0049e2d6" officeooo:paragraph-rsid="0049e2d6"/>
    </style:style>
    <style:style style:name="P76" style:family="paragraph" style:parent-style-name="Text_20_body" style:list-style-name="L6">
      <style:text-properties style:rfc-language-tag="sr-Latn-RS" fo:language="sr" fo:script="Latn" fo:country="RS" officeooo:rsid="005a8fe0" officeooo:paragraph-rsid="005a8fe0"/>
    </style:style>
    <style:style style:name="P77" style:family="paragraph" style:parent-style-name="Text_20_body" style:list-style-name="L6">
      <style:text-properties style:rfc-language-tag="sr-Latn-RS" fo:language="sr" fo:script="Latn" fo:country="RS" officeooo:rsid="005a8fe0" officeooo:paragraph-rsid="005bc2ea"/>
    </style:style>
    <style:style style:name="P78" style:family="paragraph" style:parent-style-name="Text_20_body" style:list-style-name="L6">
      <style:text-properties style:rfc-language-tag="sr-Latn-RS" fo:language="sr" fo:script="Latn" fo:country="RS" officeooo:rsid="005ab6ee" officeooo:paragraph-rsid="005bc2ea"/>
    </style:style>
    <style:style style:name="P79" style:family="paragraph" style:parent-style-name="Text_20_body" style:list-style-name="L6">
      <style:text-properties style:rfc-language-tag="sr-Latn-RS" fo:language="sr" fo:script="Latn" fo:country="RS" officeooo:rsid="005bc2ea" officeooo:paragraph-rsid="005bc2ea"/>
    </style:style>
    <style:style style:name="P80" style:family="paragraph" style:parent-style-name="Text_20_body" style:list-style-name="L7">
      <style:text-properties style:rfc-language-tag="sr-Latn-RS" fo:language="sr" fo:script="Latn" fo:country="RS" officeooo:rsid="0017aedc" officeooo:paragraph-rsid="00520e81"/>
    </style:style>
    <style:style style:name="P81" style:family="paragraph" style:parent-style-name="Text_20_body" style:list-style-name="L7">
      <style:text-properties style:rfc-language-tag="sr-Latn-RS" fo:language="sr" fo:script="Latn" fo:country="RS" officeooo:rsid="00184a9a" officeooo:paragraph-rsid="00520e81"/>
    </style:style>
    <style:style style:name="P82" style:family="paragraph" style:parent-style-name="Text_20_body" style:list-style-name="L9">
      <style:text-properties style:rfc-language-tag="sr-Latn-RS" fo:language="sr" fo:script="Latn" fo:country="RS" officeooo:rsid="003b1f49" officeooo:paragraph-rsid="003b1f49"/>
    </style:style>
    <style:style style:name="P83" style:family="paragraph" style:parent-style-name="Text_20_body" style:list-style-name="L4"/>
    <style:style style:name="P84" style:family="paragraph" style:parent-style-name="Text_20_body" style:list-style-name="L6">
      <style:text-properties officeooo:paragraph-rsid="005e6134"/>
    </style:style>
    <style:style style:name="P85" style:family="paragraph" style:parent-style-name="Text_20_body" style:list-style-name="L7">
      <style:text-properties officeooo:paragraph-rsid="00520e81"/>
    </style:style>
    <style:style style:name="P86" style:family="paragraph" style:parent-style-name="Text_20_body" style:list-style-name="L8">
      <style:text-properties fo:language="en" fo:country="US" officeooo:rsid="003d66a6" officeooo:paragraph-rsid="003d66a6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138dad"/>
    </style:style>
    <style:style style:name="T4" style:family="text">
      <style:text-properties style:rfc-language-tag="sr-Latn-RS" fo:language="sr" fo:script="Latn" fo:country="RS" officeooo:rsid="0016598e"/>
    </style:style>
    <style:style style:name="T5" style:family="text">
      <style:text-properties style:rfc-language-tag="sr-Latn-RS" fo:language="sr" fo:script="Latn" fo:country="RS" officeooo:rsid="00174d6e"/>
    </style:style>
    <style:style style:name="T6" style:family="text">
      <style:text-properties style:rfc-language-tag="sr-Latn-RS" fo:language="sr" fo:script="Latn" fo:country="RS" officeooo:rsid="0017aedc"/>
    </style:style>
    <style:style style:name="T7" style:family="text">
      <style:text-properties style:rfc-language-tag="sr-Latn-RS" fo:language="sr" fo:script="Latn" fo:country="RS" officeooo:rsid="00184a9a"/>
    </style:style>
    <style:style style:name="T8" style:family="text">
      <style:text-properties style:rfc-language-tag="sr-Latn-RS" fo:language="sr" fo:script="Latn" fo:country="RS" officeooo:rsid="00193d19"/>
    </style:style>
    <style:style style:name="T9" style:family="text">
      <style:text-properties style:rfc-language-tag="sr-Latn-RS" fo:language="sr" fo:script="Latn" fo:country="RS" officeooo:rsid="001a7f49"/>
    </style:style>
    <style:style style:name="T10" style:family="text">
      <style:text-properties style:rfc-language-tag="sr-Latn-RS" fo:language="sr" fo:script="Latn" fo:country="RS" officeooo:rsid="001c00a9"/>
    </style:style>
    <style:style style:name="T11" style:family="text">
      <style:text-properties style:rfc-language-tag="sr-Latn-RS" fo:language="sr" fo:script="Latn" fo:country="RS" officeooo:rsid="001d6376"/>
    </style:style>
    <style:style style:name="T12" style:family="text">
      <style:text-properties style:rfc-language-tag="sr-Latn-RS" fo:language="sr" fo:script="Latn" fo:country="RS" officeooo:rsid="001e3d75"/>
    </style:style>
    <style:style style:name="T13" style:family="text">
      <style:text-properties style:rfc-language-tag="sr-Latn-RS" fo:language="sr" fo:script="Latn" fo:country="RS" officeooo:rsid="001ec5a7"/>
    </style:style>
    <style:style style:name="T14" style:family="text">
      <style:text-properties style:rfc-language-tag="sr-Latn-RS" fo:language="sr" fo:script="Latn" fo:country="RS" officeooo:rsid="00209ca8"/>
    </style:style>
    <style:style style:name="T15" style:family="text">
      <style:text-properties style:rfc-language-tag="sr-Latn-RS" fo:language="sr" fo:script="Latn" fo:country="RS" officeooo:rsid="0022099e"/>
    </style:style>
    <style:style style:name="T16" style:family="text">
      <style:text-properties style:rfc-language-tag="sr-Latn-RS" fo:language="sr" fo:script="Latn" fo:country="RS" officeooo:rsid="0022b9c0"/>
    </style:style>
    <style:style style:name="T17" style:family="text">
      <style:text-properties style:rfc-language-tag="sr-Latn-RS" fo:language="sr" fo:script="Latn" fo:country="RS" officeooo:rsid="0022f80a"/>
    </style:style>
    <style:style style:name="T18" style:family="text">
      <style:text-properties style:rfc-language-tag="sr-Latn-RS" fo:language="sr" fo:script="Latn" fo:country="RS" officeooo:rsid="0023f8e1"/>
    </style:style>
    <style:style style:name="T19" style:family="text">
      <style:text-properties style:rfc-language-tag="sr-Latn-RS" fo:language="sr" fo:script="Latn" fo:country="RS" officeooo:rsid="0025cf3f"/>
    </style:style>
    <style:style style:name="T20" style:family="text">
      <style:text-properties style:rfc-language-tag="sr-Latn-RS" fo:language="sr" fo:script="Latn" fo:country="RS" officeooo:rsid="00289180"/>
    </style:style>
    <style:style style:name="T21" style:family="text">
      <style:text-properties style:rfc-language-tag="sr-Latn-RS" fo:language="sr" fo:script="Latn" fo:country="RS" fo:font-weight="bold" style:font-weight-asian="bold" style:font-weight-complex="bold"/>
    </style:style>
    <style:style style:name="T22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3" style:family="text">
      <style:text-properties style:rfc-language-tag="sr-Latn-RS" fo:language="sr" fo:script="Latn" fo:country="RS" fo:font-weight="bold" officeooo:rsid="00209ca8" style:font-weight-asian="bold" style:font-weight-complex="bold"/>
    </style:style>
    <style:style style:name="T24" style:family="text">
      <style:text-properties style:rfc-language-tag="sr-Latn-RS" fo:language="sr" fo:script="Latn" fo:country="RS" fo:font-weight="bold" officeooo:rsid="005957f8" style:font-weight-asian="bold" style:font-weight-complex="bold"/>
    </style:style>
    <style:style style:name="T25" style:family="text">
      <style:text-properties style:rfc-language-tag="sr-Latn-RS" fo:language="sr" fo:script="Latn" fo:country="RS" officeooo:rsid="002ee0d7"/>
    </style:style>
    <style:style style:name="T26" style:family="text">
      <style:text-properties style:rfc-language-tag="sr-Latn-RS" fo:language="sr" fo:script="Latn" fo:country="RS" officeooo:rsid="0033b3e7"/>
    </style:style>
    <style:style style:name="T27" style:family="text">
      <style:text-properties style:rfc-language-tag="sr-Latn-RS" fo:language="sr" fo:script="Latn" fo:country="RS" officeooo:rsid="0034a43a"/>
    </style:style>
    <style:style style:name="T28" style:family="text">
      <style:text-properties style:rfc-language-tag="sr-Latn-RS" fo:language="sr" fo:script="Latn" fo:country="RS" officeooo:rsid="00377f03"/>
    </style:style>
    <style:style style:name="T29" style:family="text">
      <style:text-properties style:rfc-language-tag="sr-Latn-RS" fo:language="sr" fo:script="Latn" fo:country="RS" officeooo:rsid="003b1f49"/>
    </style:style>
    <style:style style:name="T30" style:family="text">
      <style:text-properties style:rfc-language-tag="sr-Latn-RS" fo:language="sr" fo:script="Latn" fo:country="RS" officeooo:rsid="003d66a6"/>
    </style:style>
    <style:style style:name="T31" style:family="text">
      <style:text-properties style:rfc-language-tag="sr-Latn-RS" fo:language="sr" fo:script="Latn" fo:country="RS" officeooo:rsid="003f1017"/>
    </style:style>
    <style:style style:name="T32" style:family="text">
      <style:text-properties style:rfc-language-tag="sr-Latn-RS" fo:language="sr" fo:script="Latn" fo:country="RS" officeooo:rsid="0040270f"/>
    </style:style>
    <style:style style:name="T33" style:family="text">
      <style:text-properties style:rfc-language-tag="sr-Latn-RS" fo:language="sr" fo:script="Latn" fo:country="RS" officeooo:rsid="00463b0d"/>
    </style:style>
    <style:style style:name="T34" style:family="text">
      <style:text-properties style:rfc-language-tag="sr-Latn-RS" fo:language="sr" fo:script="Latn" fo:country="RS" fo:font-style="italic" fo:background-color="#eeeeee" loext:char-shading-value="0" style:font-style-asian="italic" style:font-style-complex="italic"/>
    </style:style>
    <style:style style:name="T35" style:family="text">
      <style:text-properties style:rfc-language-tag="sr-Latn-RS" fo:language="sr" fo:script="Latn" fo:country="RS" fo:font-style="italic" officeooo:rsid="00193d19" style:font-style-asian="italic" style:font-style-complex="italic"/>
    </style:style>
    <style:style style:name="T36" style:family="text">
      <style:text-properties style:rfc-language-tag="sr-Latn-RS" fo:language="sr" fo:script="Latn" fo:country="RS" fo:font-style="italic" officeooo:rsid="001a7f49" style:font-style-asian="italic" style:font-style-complex="italic"/>
    </style:style>
    <style:style style:name="T37" style:family="text">
      <style:text-properties style:rfc-language-tag="sr-Latn-RS" fo:language="sr" fo:script="Latn" fo:country="RS" fo:font-style="italic" officeooo:rsid="005e6134" style:font-style-asian="italic" style:font-style-complex="italic"/>
    </style:style>
    <style:style style:name="T38" style:family="text">
      <style:text-properties style:rfc-language-tag="sr-Latn-RS" fo:language="sr" fo:script="Latn" fo:country="RS" fo:font-style="italic" officeooo:rsid="005fb252" style:font-style-asian="italic" style:font-style-complex="italic"/>
    </style:style>
    <style:style style:name="T39" style:family="text">
      <style:text-properties style:rfc-language-tag="sr-Latn-RS" fo:language="sr" fo:script="Latn" fo:country="RS" officeooo:rsid="004c05fe"/>
    </style:style>
    <style:style style:name="T40" style:family="text">
      <style:text-properties style:rfc-language-tag="sr-Latn-RS" fo:language="sr" fo:script="Latn" fo:country="RS" officeooo:rsid="004cf43b"/>
    </style:style>
    <style:style style:name="T41" style:family="text">
      <style:text-properties style:rfc-language-tag="sr-Latn-RS" fo:language="sr" fo:script="Latn" fo:country="RS" officeooo:rsid="004e1498"/>
    </style:style>
    <style:style style:name="T42" style:family="text">
      <style:text-properties style:rfc-language-tag="sr-Latn-RS" fo:language="sr" fo:script="Latn" fo:country="RS" officeooo:rsid="004ff3db"/>
    </style:style>
    <style:style style:name="T43" style:family="text">
      <style:text-properties style:rfc-language-tag="sr-Latn-RS" fo:language="sr" fo:script="Latn" fo:country="RS" fo:background-color="#dde8cb" loext:char-shading-value="0"/>
    </style:style>
    <style:style style:name="T44" style:family="text">
      <style:text-properties style:rfc-language-tag="sr-Latn-RS" fo:language="sr" fo:script="Latn" fo:country="RS" officeooo:rsid="005957f8"/>
    </style:style>
    <style:style style:name="T45" style:family="text">
      <style:text-properties style:rfc-language-tag="sr-Latn-RS" fo:language="sr" fo:script="Latn" fo:country="RS" officeooo:rsid="0061dcaa"/>
    </style:style>
    <style:style style:name="T46" style:family="text">
      <style:text-properties style:rfc-language-tag="sr-Latn-RS" fo:language="sr" fo:script="Latn" fo:country="RS" officeooo:rsid="00630498"/>
    </style:style>
    <style:style style:name="T47" style:family="text">
      <style:text-properties fo:language="de" fo:country="DE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50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51" style:family="text">
      <style:text-properties officeooo:rsid="00138dad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193d19"/>
    </style:style>
    <style:style style:name="T54" style:family="text">
      <style:text-properties fo:language="en" fo:country="US" officeooo:rsid="001ae053"/>
    </style:style>
    <style:style style:name="T55" style:family="text">
      <style:text-properties fo:language="en" fo:country="US" officeooo:rsid="001ec5a7"/>
    </style:style>
    <style:style style:name="T56" style:family="text">
      <style:text-properties fo:language="en" fo:country="US" officeooo:rsid="00209ca8"/>
    </style:style>
    <style:style style:name="T57" style:family="text">
      <style:text-properties fo:language="en" fo:country="US" officeooo:rsid="0023f8e1"/>
    </style:style>
    <style:style style:name="T58" style:family="text">
      <style:text-properties fo:language="en" fo:country="US" fo:font-weight="normal" style:font-weight-asian="normal" style:font-weight-complex="normal"/>
    </style:style>
    <style:style style:name="T59" style:family="text">
      <style:text-properties fo:language="en" fo:country="US" fo:font-weight="normal" officeooo:rsid="002ee0d7" style:font-weight-asian="normal" style:font-weight-complex="normal"/>
    </style:style>
    <style:style style:name="T60" style:family="text">
      <style:text-properties fo:language="en" fo:country="US" officeooo:rsid="002d282d"/>
    </style:style>
    <style:style style:name="T61" style:family="text">
      <style:text-properties fo:language="en" fo:country="US" officeooo:rsid="0033b3e7"/>
    </style:style>
    <style:style style:name="T62" style:family="text">
      <style:text-properties fo:language="en" fo:country="US" officeooo:rsid="00377f03"/>
    </style:style>
    <style:style style:name="T63" style:family="text">
      <style:text-properties fo:language="en" fo:country="US" officeooo:rsid="00404dc6"/>
    </style:style>
    <style:style style:name="T64" style:family="text">
      <style:text-properties fo:language="en" fo:country="US" officeooo:rsid="0049000a"/>
    </style:style>
    <style:style style:name="T65" style:family="text">
      <style:text-properties fo:language="en" fo:country="US" fo:font-style="italic" officeooo:rsid="0049000a" fo:background-color="#eeeeee" loext:char-shading-value="0" style:font-style-asian="italic" style:font-style-complex="italic"/>
    </style:style>
    <style:style style:name="T66" style:family="text">
      <style:text-properties fo:language="en" fo:country="US" officeooo:rsid="001a7f49"/>
    </style:style>
    <style:style style:name="T67" style:family="text">
      <style:text-properties fo:language="en" fo:country="US" officeooo:rsid="004c05fe"/>
    </style:style>
    <style:style style:name="T68" style:family="text">
      <style:text-properties fo:language="en" fo:country="US" fo:background-color="#dde8cb" loext:char-shading-value="0"/>
    </style:style>
    <style:style style:name="T69" style:family="text">
      <style:text-properties fo:language="en" fo:country="US" officeooo:rsid="0059fe36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a3aff" style:font-weight-asian="bold" style:font-weight-complex="bold"/>
    </style:style>
    <style:style style:name="T72" style:family="text">
      <style:text-properties fo:font-weight="bold" officeooo:rsid="005bc2ea" style:font-weight-asian="bold" style:font-weight-complex="bold"/>
    </style:style>
    <style:style style:name="T73" style:family="text">
      <style:text-properties fo:font-weight="bold" fo:background-color="#dde8cb" loext:char-shading-value="0" style:font-weight-asian="bold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ee0d7" style:font-weight-asian="normal" style:font-weight-complex="normal"/>
    </style:style>
    <style:style style:name="T76" style:family="text">
      <style:text-properties officeooo:rsid="002a3aff"/>
    </style:style>
    <style:style style:name="T77" style:family="text">
      <style:text-properties officeooo:rsid="0031b78a"/>
    </style:style>
    <style:style style:name="T78" style:family="text">
      <style:text-properties officeooo:rsid="003985f2"/>
    </style:style>
    <style:style style:name="T79" style:family="text">
      <style:text-properties officeooo:rsid="003b1f49"/>
    </style:style>
    <style:style style:name="T80" style:family="text">
      <style:text-properties officeooo:rsid="003bda5e"/>
    </style:style>
    <style:style style:name="T81" style:family="text">
      <style:text-properties officeooo:rsid="003d66a6"/>
    </style:style>
    <style:style style:name="T82" style:family="text">
      <style:text-properties officeooo:rsid="003f1017"/>
    </style:style>
    <style:style style:name="T83" style:family="text">
      <style:text-properties fo:color="#859900"/>
    </style:style>
    <style:style style:name="T84" style:family="text">
      <style:text-properties fo:color="#859900" style:rfc-language-tag="sr-Latn-RS" fo:language="sr" fo:script="Latn" fo:country="RS" officeooo:rsid="0040270f"/>
    </style:style>
    <style:style style:name="T85" style:family="text">
      <style:text-properties fo:color="#333333"/>
    </style:style>
    <style:style style:name="T86" style:family="text">
      <style:text-properties fo:color="#333333" style:rfc-language-tag="sr-Latn-RS" fo:language="sr" fo:script="Latn" fo:country="RS" officeooo:rsid="0040270f"/>
    </style:style>
    <style:style style:name="T87" style:family="text">
      <style:text-properties fo:color="#586e75"/>
    </style:style>
    <style:style style:name="T88" style:family="text">
      <style:text-properties fo:color="#586e75" style:rfc-language-tag="sr-Latn-RS" fo:language="sr" fo:script="Latn" fo:country="RS" officeooo:rsid="0040270f"/>
    </style:style>
    <style:style style:name="T89" style:family="text">
      <style:text-properties fo:font-style="italic" fo:background-color="#eeeeee" loext:char-shading-value="0" style:font-style-asian="italic" style:font-style-complex="italic"/>
    </style:style>
    <style:style style:name="T90" style:family="text">
      <style:text-properties fo:font-style="italic" officeooo:rsid="004729fe" fo:background-color="#eeeeee" loext:char-shading-value="0" style:font-style-asian="italic" style:font-style-complex="italic"/>
    </style:style>
    <style:style style:name="T91" style:family="text">
      <style:text-properties fo:font-style="italic" officeooo:rsid="005d14d9" fo:background-color="#eeeeee" loext:char-shading-value="0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5d14d9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5" style:family="text">
      <style:text-properties officeooo:rsid="0049000a"/>
    </style:style>
    <style:style style:name="T96" style:family="text">
      <style:text-properties fo:background-color="#eeeeee" loext:char-shading-value="0"/>
    </style:style>
    <style:style style:name="T97" style:family="text">
      <style:text-properties officeooo:rsid="0049e2d6"/>
    </style:style>
    <style:style style:name="T98" style:family="text">
      <style:text-properties officeooo:rsid="00502a80"/>
    </style:style>
    <style:style style:name="T99" style:family="text">
      <style:text-properties officeooo:rsid="00520e81"/>
    </style:style>
    <style:style style:name="T100" style:family="text">
      <style:text-properties fo:color="#2a6099" fo:font-weight="bold" fo:background-color="#dde8cb" loext:char-shading-value="0" style:font-weight-asian="bold" style:font-weight-complex="bold"/>
    </style:style>
    <style:style style:name="T101" style:family="text">
      <style:text-properties fo:color="#2a6099" fo:language="en" fo:country="US" fo:font-weight="bold" fo:background-color="#dde8cb" loext:char-shading-value="0" style:font-weight-asian="bold" style:font-weight-complex="bold"/>
    </style:style>
    <style:style style:name="T102" style:family="text">
      <style:text-properties fo:color="#2a6099" style:rfc-language-tag="sr-Latn-RS" fo:language="sr" fo:script="Latn" fo:country="RS" fo:font-weight="bold" fo:background-color="#dde8cb" loext:char-shading-value="0" style:font-weight-asian="bold" style:font-weight-complex="bold"/>
    </style:style>
    <style:style style:name="T103" style:family="text">
      <style:text-properties fo:background-color="#dde8cb" loext:char-shading-value="0"/>
    </style:style>
    <style:style style:name="T104" style:family="text">
      <style:text-properties fo:language="sr" fo:country="RS" officeooo:rsid="00193d19"/>
    </style:style>
    <style:style style:name="T105" style:family="text">
      <style:text-properties fo:language="sr" fo:country="RS" officeooo:rsid="0057aa12"/>
    </style:style>
    <style:style style:name="T106" style:family="text">
      <style:text-properties officeooo:rsid="005a8fe0"/>
    </style:style>
    <style:style style:name="T107" style:family="text">
      <style:text-properties officeooo:rsid="005ab6ee"/>
    </style:style>
    <style:style style:name="T108" style:family="text">
      <style:text-properties officeooo:rsid="005d14d9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05d14d9" style:font-style-asian="normal" style:font-style-complex="normal"/>
    </style:style>
    <style:style style:name="T111" style:family="text">
      <style:text-properties officeooo:rsid="005e6134"/>
    </style:style>
    <style:style style:name="T112" style:family="text">
      <style:text-properties style:font-name="Liberation Mono1" style:rfc-language-tag="sr-Latn-RS" fo:language="sr" fo:script="Latn" fo:country="RS" fo:font-style="italic" officeooo:rsid="005fb252" style:font-style-asian="italic" style:font-style-complex="italic"/>
    </style:style>
    <style:style style:name="T113" style:family="text">
      <style:text-properties officeooo:rsid="005fe0a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58"><draw:frame draw:style-name="fr7" draw:name="Picture 77" text:anchor-type="char" svg:x="0.1189in" svg:y="-0.298in" svg:width="1.548in" svg:height="1.389in" draw:z-index="0"><draw:image xlink:href="Pictures/1000000000000107000000ECA11EF1A87FCC6535.png" xlink:type="simple" xlink:show="embed" xlink:actuate="onLoad" loext:mime-type="image/png"/></draw:frame><draw:frame draw:style-name="fr7" draw:name="Picture 78" text:anchor-type="char" svg:x="5.3098in" svg:y="-0.298in" svg:width="1.3992in" svg:height="1.3689in" draw:z-index="1"><draw:image xlink:href="Pictures/10000000000000E6000000E15BCFE3BBC3FB7146.png" xlink:type="simple" xlink:show="embed" xlink:actuate="onLoad" loext:mime-type="image/png"/></draw:frame>UNIVERZITET U NIŠU</text:p>
      <text:p text:style-name="P10">ELEKTRONSKI FAKULTET</text:p>
      <text:p text:style-name="P10">Katedra za računarstv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Seminarski rad</text:p>
      <text:p text:style-name="P54"><text:span text:style-name="T48">Interna struktura i organizacija indeksa </text:span><text:span text:style-name="T50">kod</text:span><text:span text:style-name="T48"> Neo4j</text:span><text:span text:style-name="T49"> baz</text:span><text:span text:style-name="T50">e</text:span></text:p>
      <text:p text:style-name="P12">Sistemi za upravljanje bazama podataka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7"><text:span text:style-name="T2"><text:tab/><text:tab/>Student</text:span><text:span text:style-name="T47"><text:tab/><text:tab/><text:tab/><text:tab/><text:tab/><text:tab/></text:span><text:span text:style-name="T2"><text:tab/></text:span><text:span text:style-name="T47">Mentor:</text:span></text:p>
      <text:p text:style-name="P7"><text:span text:style-name="T2"><text:tab/></text:span><text:span text:style-name="T47">Lazar Đorđević, br ind. </text:span><text:span text:style-name="T2">1413</text:span><text:span text:style-name="T47"><text:tab/><text:tab/><text:tab/></text:span><text:span text:style-name="T2">Doc</text:span><text:span text:style-name="T47">. dr. </text:span><text:span text:style-name="T2">Aleksandar Stanimirović</text:span></text:p>
      <text:p text:style-name="P5"/>
      <text:p text:style-name="P5"/>
      <text:p text:style-name="P5"/>
      <text:p text:style-name="P5"/>
      <text:p text:style-name="P4"><text:span text:style-name="T47">Niš, 202</text:span><text:span text:style-name="T2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7">Sadržaj</text:p>
          </text:index-title>
          <text:p text:style-name="P55"><text:a xlink:type="simple" xlink:href="#__RefHeading___Toc19122_3731682282" text:style-name="Index_20_Link" text:visited-style-name="Index_20_Link">Uvod<text:tab/>3</text:a></text:p>
          <text:p text:style-name="P55"><text:a xlink:type="simple" xlink:href="#__RefHeading___Toc38118_3731682282" text:style-name="Index_20_Link" text:visited-style-name="Index_20_Link">Indeks (baza podataka)<text:tab/>4</text:a></text:p>
          <text:p text:style-name="P55"><text:a xlink:type="simple" xlink:href="#__RefHeading___Toc38121_3731682282" text:style-name="Index_20_Link" text:visited-style-name="Index_20_Link">Interna struktura Neo4j baze<text:tab/>5</text:a></text:p>
          <text:p text:style-name="P56"><text:a xlink:type="simple" xlink:href="#__RefHeading___Toc38478_3731682282" text:style-name="Index_20_Link" text:visited-style-name="Index_20_Link">Constraint<text:tab/>5</text:a></text:p>
          <text:p text:style-name="P56"><text:a xlink:type="simple" xlink:href="#__RefHeading___Toc38480_3731682282" text:style-name="Index_20_Link" text:visited-style-name="Index_20_Link">Tipovi indeksa<text:tab/>7</text:a></text:p>
          <text:p text:style-name="P55"><text:a xlink:type="simple" xlink:href="#__RefHeading___Toc38520_3731682282" text:style-name="Index_20_Link" text:visited-style-name="Index_20_Link">Indeksiranje<text:tab/>8</text:a></text:p>
          <text:p text:style-name="P56"><text:a xlink:type="simple" xlink:href="#__RefHeading___Toc3100_4290455764" text:style-name="Index_20_Link" text:visited-style-name="Index_20_Link">Primer lookup indeksa<text:tab/>9</text:a></text:p>
          <text:p text:style-name="P56"><text:a xlink:type="simple" xlink:href="#__RefHeading___Toc3102_4290455764" text:style-name="Index_20_Link" text:visited-style-name="Index_20_Link">Primer full-text indeksa<text:tab/>11</text:a></text:p>
          <text:p text:style-name="P55"><text:a xlink:type="simple" xlink:href="#__RefHeading___Toc19124_3731682282" text:style-name="Index_20_Link" text:visited-style-name="Index_20_Link">Reference<text:tab/>12</text:a></text:p>
        </text:index-body>
      </text:table-of-content>
      <text:p text:style-name="P9"/>
      <text:h text:style-name="P59" text:outline-level="1"><text:bookmark-start text:name="__RefHeading___Toc19122_3731682282"/>Uvod<text:bookmark-end text:name="__RefHeading___Toc19122_3731682282"/></text:h>
      <text:p text:style-name="P21"/>
      <text:p text:style-name="Text_20_body">Cilj ovog rada je <text:span text:style-name="T51">da se pokaže uticaj indeksa koje podržava Neo4j DBMS na efikasnost upita na jednostavnim primerima.</text:span><text:span text:style-name="T3"> </text:span><text:span text:style-name="T4">Većina primera je preuzeta iz dokumentacije i zapravo su ilustracija osnovnih preporuka za rad sa Neo4j DBMS-om. Podaci koji su korišćeni u primerima se mogu naći na zvaničnom sajtu Neo4j-a.</text:span></text:p>
      <text:h text:style-name="P60" text:outline-level="1"><text:bookmark-start text:name="__RefHeading___Toc38118_3731682282"/>Indeks (baza podataka)<text:bookmark-end text:name="__RefHeading___Toc38118_3731682282"/></text:h>
      <text:p text:style-name="P45"><text:span text:style-name="T5">D</text:span><text:span text:style-name="T1">BMS omogućava korisnicima baze podataka da efikasno pristupaju, pretražuju i skladište podatke.</text:span><text:span text:style-name="T52">[2] </text:span><text:span text:style-name="T1">Jedinica u kojoj se uglavnom izražava količina podataka se zove stranica (veličine stranice nisu jednake </text:span><text:span text:style-name="T11">za sve DBMS-ove veličina je uglavnom 8KB, kod nekih je konfigurabilna</text:span><text:span text:style-name="T1">)</text:span><text:span text:style-name="T11">. Podaci se pamte na eksternim uređajima, ili glavnoj memoriji. U nastavku će se koristiti izraz disk kada se govori o eksternim uređajima zbog čitljivosti. </text:span></text:p>
      <text:p text:style-name="P46"><text:span text:style-name="T12">Upis</text:span><text:span text:style-name="T1"> na disk podrazumeva da je podatak</text:span><text:span text:style-name="T12"> ili deo podatka (slog)</text:span><text:span text:style-name="T1"> ispravno zapamćen i</text:span><text:span text:style-name="T12"> da mu se nadalje može pristupiti preko ključa (ID sloga). U fajl sistemu svaki fajl</text:span><text:span text:style-name="T13"> ili deo fajla</text:span><text:span text:style-name="T12"> </text:span><text:span text:style-name="T13">pripada nekom</text:span><text:span text:style-name="T12"> </text:span><text:span text:style-name="T13">slogu</text:span><text:span text:style-name="T12">, što čini optimalnim </text:span><text:span text:style-name="T13">pretragu jednog fajla</text:span><text:span text:style-name="T12">, ali pretraga bi morala da se vrši sekvencijalno ako bi bilo potrebno da nađemo fajl na osnovu nekog uslova</text:span><text:span text:style-name="T13"> (nadalje ključ pretrage) a da ne znamo početni slog</text:span><text:span text:style-name="T12">. </text:span><text:span text:style-name="T13">Alternativa tome bi bila da se fajlovi sortiraju po ključu pretrage, ili</text:span><text:span text:style-name="T55"> </text:span><text:span text:style-name="T56">indeksiraju -</text:span><text:span text:style-name="T55"> </text:span><text:span text:style-name="T13">da </text:span><text:span text:style-name="T14">se napravi</text:span><text:span text:style-name="T13"> struktura podataka (stablo ili heš tablica) koja će za ključ pretrage moći da vrati ID sloga.</text:span><text:span text:style-name="T56">[3]</text:span><text:span text:style-name="T14"> Treba imati u vidu da je za alternativna rešenja potrebno dodatno vreme za sortiranje, ili ažuriranje strukture podataka.</text:span></text:p>
      <text:p text:style-name="P44"><text:span text:style-name="T1">Indeks je struktura podataka koja se koristi da </text:span><text:span text:style-name="T6">ubrza </text:span><text:span text:style-name="T1">pretragu</text:span><text:span text:style-name="T6"> podataka</text:span><text:span text:style-name="T1">. Da bi se to postiglo indeks sadrži redundantne podatke</text:span><text:span text:style-name="T9">. Cena ubrzanja je dodatno zauzeće diska/memorije, sporije ažuriranje/upisivanje podataka.</text:span><text:span text:style-name="T54">[1]</text:span><text:span text:style-name="T9"> </text:span></text:p>
      <text:p text:style-name="P52"><text:span text:style-name="T1">Maltene svaki DBMS koristi specifične strukture za indeksiranje.</text:span><text:span text:style-name="T41"> </text:span><text:span text:style-name="T1">Odluka o tome šta će se indeksirati i kako nije trivijalna, zato treba definisati metriku za upoređivanje operacija i upita</text:span><text:span text:style-name="T40">.</text:span><text:span text:style-name="T41"> Brzina pretrage izgleda na prvi pogled kao relevantna metrika, s obzirom na to da utiče na izvršenje upita, ali to nije uvek najbolji način za upoređivanje upita</text:span><text:span text:style-name="T42">. Na vreme izvršenja mogu da utiču procesi koji se u tom trenutku izvršavaju na serveru, pa i sam alat koji se koristi za monitoring</text:span><text:span text:style-name="T41">. </text:span><text:span text:style-name="T42">Ako se radi o instanci baze koja upisuje podatke na jedan disk, broj upisa/pristupa disku je dobar kandidat za metriku, uz pretpostavku da je vreme pristupa disku konstantno</text:span><text:span text:style-name="T1">.</text:span><text:span text:style-name="T42"> Koja metrika će se koristiti dosta zavisi od DBMS-a i alata koji su na raspolaganju. </text:span></text:p>
      <text:p text:style-name="P52"><text:span text:style-name="T42">U</text:span><text:span text:style-name="T1"> </text:span><text:span text:style-name="T41">narednom</text:span><text:span text:style-name="T1"> poglavlju će biti razmotrena interna struktura Neo4j-a</text:span><text:span text:style-name="T40"> i</text:span><text:span text:style-name="T15"> tipovi indeksa.</text:span></text:p>
      <text:h text:style-name="P61" text:outline-level="1"><text:bookmark-start text:name="__RefHeading___Toc38121_3731682282"/>Interna struktura Neo4j baze<text:bookmark-end text:name="__RefHeading___Toc38121_3731682282"/></text:h>
      <text:p text:style-name="P27">Model graf baza podataka predstavlja graf. Graf baze se mogu podeliti na:</text:p>
      <text:list xml:id="list1797841559" text:style-name="L1">
        <text:list-item>
          <text:p text:style-name="P67"><text:span text:style-name="T22">RDF</text:span><text:span text:style-name="T15"> - uređene trojke ili četvorke</text:span></text:p>
        </text:list-item>
        <text:list-item>
          <text:p text:style-name="P67"><text:span text:style-name="T22">Labeled-property model</text:span><text:span text:style-name="T15"> - predstavljen je čvorovima, relacijama, property-ima i labelama. Čvorovi i relacije mogu biti označeni i mogu da sadrže podatke. Svaki podatak se pamti kao property (key – value par). Čvorovi mogu biti grupisani na osnovu labela. Relacije su uvek usmerene i mogu da sadrže dodatne podatke. </text:span></text:p>
        </text:list-item>
      </text:list>
      <text:p text:style-name="P47"><text:span text:style-name="T1">Neo4j koristi labeled-property model. Za razliku od relacionih baza, svi entiteti u graf bazama su </text:span><text:span text:style-name="T16">suštinski</text:span><text:span text:style-name="T1"> deo jedne strukture</text:span><text:span text:style-name="T16">, iako nisu logički povezani</text:span><text:span text:style-name="T1">. To znači da</text:span><text:span text:style-name="T16"> i pretraga jednog entiteta može biti neefikasna zbog broja čvorova ili relacija u grafu koji, iz ugla korisnika, nemaju veze sa rezultatom upita/pretrage.</text:span><text:span text:style-name="T18"> Zato se u novijim verzijama (4.3 i više) prilikom pravljenja grafa automatski kreira indeks koji se koristi za pretragu čvorova i relacija po labelama (dakle utiče na performanse maltene svih upita nad grafom).</text:span><text:span text:style-name="T57">[</text:span><text:span text:style-name="T69">1</text:span><text:span text:style-name="T57">]</text:span><text:span text:style-name="T16"> </text:span><text:span text:style-name="T17">Kod relacionih baza se indeksi prave nad kolonom/a</text:span><text:span text:style-name="T18"> za</text:span><text:span text:style-name="T17"> konkretne tabele/entitet</text:span><text:span text:style-name="T18">e. </text:span><text:span text:style-name="T57">Relacione baze </text:span><text:span text:style-name="T18">su spomenute zato što su dosta rasprostranjene</text:span><text:span text:style-name="T19">,</text:span><text:span text:style-name="T18"> upitni jezik (Cypher) je p</text:span><text:span text:style-name="T19">ravljen da liči na SQL i uglavnom se koriste verzije B-stabla za indeksiranje, ali način izvršenja upita je potpuno drugačiji. </text:span></text:p>
      <text:h text:style-name="P64" text:outline-level="2"><text:bookmark-start text:name="__RefHeading___Toc38478_3731682282"/>Constraint<text:bookmark-end text:name="__RefHeading___Toc38478_3731682282"/></text:h>
      <text:p text:style-name="P17">Constraint <text:span text:style-name="T1">se koristi da bi se osigurao integritet podataka</text:span>.[1]<text:span text:style-name="T20"> Constraint može da se napravi nad određenim property-jem čvora ili relacije, pri čemu može da se naglasi i labela. Constraint, u zavisnosti od tipa, </text:span><text:span text:style-name="T44">garantuje</text:span><text:span text:style-name="T20"> da je određen property/skup property-ja jedinstven ili da postoji (nije NULL) za čvorove/relacije sa tom labelom.</text:span></text:p>
      <text:p text:style-name="P32">Tipovi constrainta:</text:p>
      <text:list xml:id="list793847610" text:style-name="L2">
        <text:list-item>
          <text:p text:style-name="P68"><text:span text:style-name="T70">Unique node property</text:span> - property mora da bude jedinstven za određen tip čvora ili sve čvorove</text:p>
        </text:list-item>
        <text:list-item>
          <text:p text:style-name="P68"><text:span text:style-name="T70">Unique relationship property</text:span> - property mora da bude jedinstven za određen tip relacije ili sve relacije</text:p>
        </text:list-item>
        <text:list-item>
          <text:p text:style-name="P68"><text:span text:style-name="T70">Node property existence</text:span> - property mora da postoji za određen tip čvora ili sve čvorove</text:p>
        </text:list-item>
        <text:list-item>
          <text:p text:style-name="P68"><text:span text:style-name="T70">Relationship property existence</text:span><text:span text:style-name="T74"> - property mora da postoji za određen tip relacije ili sve relacije</text:span></text:p>
        </text:list-item>
        <text:list-item>
          <text:p text:style-name="P68"><text:soft-page-break/><text:span text:style-name="T70">Node key</text:span> - property mora da postoji<text:span text:style-name="T76"> i da bude jedinstven</text:span> za određen tip čvora ili sve čvorove</text:p>
        </text:list-item>
        <text:list-item>
          <text:p text:style-name="P69"><text:span text:style-name="T71">Relationship</text:span><text:span text:style-name="T70"> key</text:span> - property mora da postoji<text:span text:style-name="T76"> i da bude jedinstven</text:span> za određen tip <text:span text:style-name="T76">relacije</text:span> ili sve <text:span text:style-name="T76">relacije</text:span></text:p>
        </text:list-item>
      </text:list>
      <text:p text:style-name="P22"><text:span text:style-name="T74"><text:tab/>Napomena: poslednja tri constrainta su podržana samo u <text:tab/>Enterprise verziji.</text:span><text:span text:style-name="T58">[1]</text:span></text:p>
      <text:p text:style-name="P33"/>
      <text:p text:style-name="P23"><text:span text:style-name="T74">Dodavanje constraint-a će biti uspešno ako constraint ne postoji za taj property, ili skup property-ja</text:span><text:span text:style-name="T75">,</text:span><text:span text:style-name="T74"> i ako ne postoji drugi constraint</text:span><text:span text:style-name="T75"> ili indeks</text:span><text:span text:style-name="T74"> sa istim imenom.</text:span><text:span text:style-name="T59">[1]</text:span></text:p>
      <text:p text:style-name="P34">Nakon dodavanja constraint-a svaka operacija koja narušava integritet podataka (pravila koja su prethodno navedena) se neće uspešno završiti, što je korisno kod IMPORT, UPDATE/MERGE i DELETE operacija.</text:p>
      <text:p text:style-name="P23"><text:span text:style-name="T74">Sintaksa </text:span><text:span text:style-name="T75">za dodavanje</text:span><text:span text:style-name="T74"> constraint-</text:span><text:span text:style-name="T75">a</text:span><text:span text:style-name="T74"> je sledeća:</text:span></text:p>
      <text:p text:style-name="P18"><draw:frame draw:style-name="fr3" draw:name="Frame1" text:anchor-type="char" svg:x="0.6799in" svg:y="0.1161in" svg:width="5.3335in" draw:z-index="2"><draw:text-box fo:min-height="2.9272in"><text:p text:style-name="Slika"><draw:frame draw:style-name="fr6" draw:name="Image1" text:anchor-type="paragraph" svg:width="5.3335in" style:rel-width="100%" svg:height="2.9272in" style:rel-height="scale" draw:z-index="3"><draw:image xlink:href="Pictures/100000000000020000000119EA64FE48FE09386E.png" xlink:type="simple" xlink:show="embed" xlink:actuate="onLoad" loext:mime-type="image/png"/></draw:frame>Slika <text:sequence text:ref-name="refSlika0" text:name="Slika" text:formula="ooow:Slika+1" style:num-format="1">1</text:sequence>: <text:span text:style-name="T52">Un</text:span><text:span text:style-name="T63">i</text:span><text:span text:style-name="T52">q</text:span><text:span text:style-name="T63">u</text:span><text:span text:style-name="T52">e</text:span><text:span text:style-name="T60"> node</text:span> constraint</text:p></draw:text-box></draw:frame></text:p>
      <text:p text:style-name="P19">Dodavanje constraint-a mo<text:span text:style-name="T1">že uticati i na performanse pretraživanja zato što je većina constraint-a (osim existence) zapravo implementirana kao indeks. </text:span><text:span text:style-name="T46">Optimizator nekad neće uzeti u obzir indekse nad nekim property-ma ukoliko ne postoji odgovarajući constraint koji garantuje da property mora da postoji, ili da nije null</text:span><text:span text:style-name="T1">. </text:span></text:p>
      <text:p text:style-name="P19"><text:span text:style-name="T1">Preporuka je da se constraint dodaje pre popunjavanja baze podacima zato što je, dodavanje constraint-a atomična operacija</text:span><text:span text:style-name="T25"> i uzrokovaće proveru svih podataka u bazi. Ako se ne naglase index provider (u OPTIONS klauzuli) i ime DBMS će sam odlučiti koji </text:span><text:soft-page-break/><text:span text:style-name="T25">provider će biti korišćen (zapravo koji tip indeksa</text:span><text:span text:style-name="T33">, uglavnom range1.0</text:span><text:span text:style-name="T25">) i automatski će dodeliti ime.</text:span></text:p>
      <text:h text:style-name="P64" text:outline-level="2"><text:bookmark-start text:name="__RefHeading___Toc38480_3731682282"/>Tipovi indeksa<text:bookmark-end text:name="__RefHeading___Toc38480_3731682282"/></text:h>
      <text:p text:style-name="P48"><text:span text:style-name="T19">I</text:span><text:span text:style-name="T1">ndeksi se mogu napraviti za jedan ili više property-ja, pa se prema tome dele na:</text:span></text:p>
      <text:list xml:id="list1895679481" text:style-name="L3">
        <text:list-item>
          <text:p text:style-name="P70">Singl</text:p>
        </text:list-item>
        <text:list-item>
          <text:p text:style-name="P70">Kompozitn<text:span text:style-name="T106">e</text:span></text:p>
        </text:list-item>
      </text:list>
      <text:p text:style-name="P24">Kod kompozitnih indeksa treba voditi računa za <text:span text:style-name="T77">tri</text:span> stvari. Prvo je da <text:span text:style-name="T77">k</text:span>ompozitni indeks treba da se pravi za konkretan <text:span text:style-name="T70">WHERE</text:span> uslov. Ukoliko <text:span text:style-name="T77">je predikat za neki od property-ja, nad kojima je kreiran kompozitni indeks, izostvaljen indeks se neće koristiti.</text:span></text:p>
      <text:p text:style-name="P36">Druga bitna stvar je da kompozitni indeks podržava sve predikate dostupne u Neo4j:</text:p>
      <text:list xml:id="list2258496051" text:style-name="L4">
        <text:list-item>
          <text:p text:style-name="P83"><text:span text:style-name="T34">equality check</text:span><text:span text:style-name="T1">: </text:span><text:span text:style-name="T43">n.prop </text:span><text:span text:style-name="T102">=</text:span><text:span text:style-name="T43"> value</text:span></text:p>
        </text:list-item>
        <text:list-item>
          <text:p text:style-name="P71"><text:span text:style-name="T90">list membership check</text:span>: <text:span text:style-name="T103">n.prop </text:span><text:span text:style-name="T100">IN</text:span><text:span text:style-name="T103"> list</text:span></text:p>
        </text:list-item>
        <text:list-item>
          <text:p text:style-name="P71"><text:span text:style-name="T90">existence check</text:span>: <text:span text:style-name="T103">n.prop </text:span><text:span text:style-name="T100">IS NOT</text:span><text:span text:style-name="T73"> NULL</text:span></text:p>
        </text:list-item>
        <text:list-item>
          <text:p text:style-name="P71"><text:span text:style-name="T90">range search</text:span>: <text:span text:style-name="T103">n.prop </text:span><text:span text:style-name="T101">&gt;</text:span><text:span text:style-name="T68"> value</text:span></text:p>
        </text:list-item>
        <text:list-item>
          <text:p text:style-name="P71"><text:span text:style-name="T90">prefix search</text:span>: <text:span text:style-name="T100">STARTS WITH</text:span></text:p>
          <text:p text:style-name="P72">Napomena: ako se koriste predikati <text:span text:style-name="T96">sufix search</text:span>(<text:span text:style-name="T70">ENDS WITH</text:span>) i <text:span text:style-name="T96">substirng search</text:span>(<text:span text:style-name="T70">SUBSTIRNG</text:span>), kompozitni indeks će se koristiti ali će ovi predikati biti planirani kao <text:span text:style-name="T96">existence check + filter</text:span>, kao i svi predikati nakon njih<text:span text:style-name="T64">[1]</text:span></text:p>
        </text:list-item>
      </text:list>
      <text:p text:style-name="P37">Treća bitna stvar kod kompozitnih indeksa je planiranje pretrage. Predikati mogu da budu planirani kao <text:span text:style-name="T89">existence check</text:span><text:span text:style-name="T65"> + filter</text:span><text:span text:style-name="T64">. </text:span><text:span text:style-name="T95">To bi trebalo izbeći kako bi se filtriranje radilo pomoću indeksa; što se može učiniti praćenjem sledećih restrikcija:</text:span></text:p>
      <text:list xml:id="list99661441" text:style-name="L5">
        <text:list-item>
          <text:p text:style-name="P73">Ako u uslovu postoje <text:span text:style-name="T89">equality check</text:span> i <text:span text:style-name="T90">list membership check</text:span> u indeksu property (ili više njih) mora biti na prvom mestu (mestima) u indeksu </text:p>
        </text:list-item>
        <text:list-item>
          <text:p text:style-name="P73">Najviše jedan <text:span text:style-name="T90">range search</text:span> ili <text:span text:style-name="T90">prefix search</text:span> predikat</text:p>
        </text:list-item>
        <text:list-item>
          <text:p text:style-name="P74">Može biti više<text:span text:style-name="T97"> </text:span><text:span text:style-name="T90">existence check</text:span> <text:span text:style-name="T97">predikata</text:span></text:p>
        </text:list-item>
        <text:list-item>
          <text:p text:style-name="P75">Svaki predikat nakon <text:span text:style-name="T90">range search</text:span>, <text:span text:style-name="T90">prefix search</text:span> ili <text:span text:style-name="T90">existence check</text:span> mora biti <text:span text:style-name="T90">existence check</text:span></text:p>
        </text:list-item>
      </text:list>
      <text:p text:style-name="P41">U novijim verzijama Neo4j-a (5 i više) dodati su indeksi za rad sa geografskim lokacijama (point) i vektorima (vector index). U dokumentaciji indeksi su podeljeni na:</text:p>
      <text:list xml:id="list2223935274" text:style-name="L6">
        <text:list-item>
          <text:p text:style-name="P76"><text:soft-page-break/><text:span text:style-name="T94">Indekse za pretraživanje</text:span> – cilj je da se nađe tačno poklapanje sa ključem pretrage; tu spadaju:</text:p>
          <text:list>
            <text:list-item>
              <text:p text:style-name="P76"><text:span text:style-name="T70">Lookup </text:span><text:span text:style-name="T72">indeksi</text:span> – koriste se na nivou svih relacija i ključeva (jedan za relacije, jedan za ključeve) u bazi. Bez njih bi se pretraga uvek vršila po svim relacijama i ključevima, bez obzira da li se navede tip</text:p>
            </text:list-item>
            <text:list-item>
              <text:p text:style-name="P77"><text:span text:style-name="T70">Range </text:span><text:span text:style-name="T72">indeksi</text:span> – <text:span text:style-name="T107">podržava većinu predikata</text:span></text:p>
            </text:list-item>
            <text:list-item>
              <text:p text:style-name="P77"><text:span text:style-name="T70">Text </text:span><text:span text:style-name="T72">indeksi</text:span> – <text:span text:style-name="T107">koristi se za stringove. </text:span><text:span text:style-name="T108">Implementacija </text:span><text:span text:style-name="T93">text 2.0</text:span><text:span text:style-name="T108"> biblioteke (default od Neo4j 5) koristi trigram pretragu; zato je pogodan za predikate </text:span><text:span text:style-name="T91">substring search</text:span><text:span text:style-name="T93"> </text:span><text:span text:style-name="T110">i </text:span><text:span text:style-name="T91">suffix search</text:span></text:p>
            </text:list-item>
            <text:list-item>
              <text:p text:style-name="P77"><text:span text:style-name="T70">Point </text:span><text:span text:style-name="T72">indeksi</text:span> – <text:span text:style-name="T107">omogućava pretragu na osnovu koordinata</text:span></text:p>
            </text:list-item>
          </text:list>
        </text:list-item>
        <text:list-item>
          <text:p text:style-name="P76"><text:span text:style-name="T94">Semantičke indekse</text:span><text:span text:style-name="T92"> –</text:span><text:span text:style-name="T109"> </text:span><text:span text:style-name="T110">ovi indeksi ne koriste tačno poklapanje, rezultat predstavlja sličnost upita sa podacima u bazi</text:span>:</text:p>
          <text:list>
            <text:list-item>
              <text:p text:style-name="P78"><text:span text:style-name="T70">Full-text </text:span><text:span text:style-name="T72">indeksi</text:span> – <text:span text:style-name="T111">podržava složeniju pretragu stringova i lista stringova. </text:span><text:span text:style-name="T113">Koristi Lucene biblioteku</text:span></text:p>
            </text:list-item>
            <text:list-item>
              <text:p text:style-name="P79"><text:span text:style-name="T70">Vector indeksi</text:span> – <text:span text:style-name="T108">za pretragu </text:span><text:span text:style-name="T111">i upoređivanje čvorova na osnovu</text:span><text:span text:style-name="T108"> </text:span><text:span text:style-name="T111">n-dimenzionalnih vektora na osnovu neke metrike ili sličnosti</text:span></text:p>
              <text:p text:style-name="P84"><text:span text:style-name="T37">Napomena: planer neće planirati full-text i vector indekse. Da bi se koristili potrebno je </text:span><text:span text:style-name="T112">pozvati</text:span><text:span text:style-name="T37"> procedure: </text:span><text:span text:style-name="Source_20_Text"><text:span text:style-name="T37">db.index.vector</text:span></text:span><text:span text:style-name="Source_20_Text"><text:span text:style-name="T38">[fulltext]</text:span></text:span><text:span text:style-name="Source_20_Text"><text:span text:style-name="T37">.queryNodes().</text:span></text:span></text:p>
            </text:list-item>
          </text:list>
        </text:list-item>
      </text:list>
      <text:p text:style-name="P42"/>
      <text:h text:style-name="P62" text:outline-level="1"><text:bookmark-start text:name="__RefHeading___Toc38520_3731682282"/>Indeksiranje<text:bookmark-end text:name="__RefHeading___Toc38520_3731682282"/></text:h>
      <text:p text:style-name="P53"><text:span text:style-name="T45">Indeksi se dodaju da bi se ubrzalo izvršenje upita. Neo4j je specifičan DBMS i ne koristi se za rešavanje generalnih problema. I pored toga što indeksi mogu značajno da ubrzaju izvršenje upita, pri projektovanju baze se mora voditi računa o upitima koji su kritični za sistem, odnosno da je use-case odgovarajući za Neo4j. </text:span><text:span text:style-name="T6">Ubrzanje može da se odnosi na vreme</text:span><text:span text:style-name="T7"> koje je potrebno za izvršenje upita</text:span><text:span text:style-name="T6">, međutim to je </text:span><text:span text:style-name="T7">vrlo često</text:span><text:span text:style-name="T6"> </text:span><text:span text:style-name="T7">nepouzdana</text:span><text:span text:style-name="T6"> metrika s obzirom na to da</text:span><text:span text:style-name="T7">:</text:span></text:p>
      <text:list xml:id="list1200895362" text:style-name="L7">
        <text:list-item>
          <text:p text:style-name="P85"><text:span text:style-name="T6">vrlo često na serveru/računaru DBMS</text:span><text:span text:style-name="T7"> nije</text:span><text:span text:style-name="T6"> jedina aplikacija koja se izvršava;</text:span><text:span text:style-name="T7"> </text:span></text:p>
        </text:list-item>
        <text:list-item>
          <text:p text:style-name="P80">podaci mogu da budu promenljivi, dakle vrlo često se ne zna unapred koliko podataka treba da bude vraćeno; </text:p>
        </text:list-item>
        <text:list-item>
          <text:p text:style-name="P85"><text:span text:style-name="T6">u mnogim slučajevima razlike u vremenu su rezultat optimizacija na hardverskom nivou (što nije predmet ovog rada)</text:span><text:span text:style-name="T7">; </text:span></text:p>
        </text:list-item>
        <text:list-item>
          <text:p text:style-name="P81">redosled izvršenja operacija/upita nekad može da utiče na upit koji se poslednji izvršio, ili tek treba da se izvrši.</text:p>
        </text:list-item>
      </text:list>
      <text:p text:style-name="P43"><text:span text:style-name="T6">Z</text:span><text:span text:style-name="T1">bog toga pouzdaniji podatak može biti broj pristupa disku</text:span><text:span text:style-name="T8">, pod uslovom da je svako čitanje/upis konstantno i da se koristi jedan disk</text:span><text:span text:style-name="T53">.</text:span><text:span text:style-name="T8"> </text:span></text:p>
      <text:p text:style-name="P43"><text:span text:style-name="T8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54">[1]</text:span><text:span text:style-name="T8">, a korišćenje alata za monitoring bi potencijalno </text:span><text:span text:style-name="T104">mog</text:span><text:span text:style-name="T105">а</text:span><text:span text:style-name="T104">o</text:span><text:span text:style-name="T8"> da utiče na performanse. </text:span><text:span text:style-name="T35">Zato se ova metrika neće koristiti</text:span><text:span text:style-name="T36"> u nastavku.</text:span><text:span text:style-name="T9"> </text:span></text:p>
      <text:p text:style-name="P43"><text:span text:style-name="T9"><text:s/>- DBhit</text:span><text:span text:style-name="T66">[1]</text:span><text:span text:style-name="T9">. </text:span></text:p>
      <text:p text:style-name="P29"><text:span text:style-name="T99">Za analizu upita u biće korišćena komanda PROFILE</text:span><text:span text:style-name="T98">. </text:span><text:span text:style-name="T99">Osim vremena izvršenja upita </text:span></text:p>
      <text:p text:style-name="P28">Ovo poglavlje sadrži primere koji ilustruju slučajeve kada je korisno koristiti određene tipove indeksa<text:span text:style-name="T98">. Indeksi služe za ubrzanje upita; u svakom primeru </text:span><text:span text:style-name="T99">će biti naglašeno da li je indeksiranje doprinelo ubrzanju i na osnovu koje metrike se došlo do tog zaključka korišćena. </text:span></text:p>
      <text:p text:style-name="P49"><text:span text:style-name="T26">Skup podataka</text:span><text:span text:style-name="T67"> koji</text:span><text:span text:style-name="T39"> će biti korišćen u primerima</text:span><text:span text:style-name="T26"> je javno dostupan na github repozitorijumu</text:span><text:span text:style-name="Strong_20_Emphasis"> neo4j-graph-examples/</text:span><text:span text:style-name="Strong_20_Emphasis"><text:span text:style-name="T28">recommendations</text:span></text:span><text:span text:style-name="Strong_20_Emphasis"><text:span text:style-name="T62">[4]</text:span></text:span><text:span text:style-name="T28">.</text:span><text:span text:style-name="T28"><text:note text:id="ftn1" text:note-class="footnote"><text:note-citation>1</text:note-citation><text:note-body><text:p text:style-name="P1">Za kreiranje baze, izvr<text:span text:style-name="T1">šenje i analizu upita korišćen je Neo4j</text:span><text:span text:style-name="T78"> Sandbox[5]</text:span></text:p></text:note-body></text:note></text:span><text:span text:style-name="T61"> </text:span><text:soft-page-break/><text:span text:style-name="T61">Model baze </text:span><text:span text:style-name="T26">ima nekoliko tipova čvorova. Korisnik može da oceni film. U kreiranju filma, koji pripada određenom žanru, učestvuju ljudi kao glumci i/ili režiseri(Slika </text:span><text:span text:style-name="T30">2</text:span><text:span text:style-name="T26">).</text:span></text:p>
      <text:p text:style-name="P25"><draw:frame draw:style-name="fr3" draw:name="Frame2" text:anchor-type="char" svg:x="0.0398in" svg:y="0.2398in" svg:width="6.6146in" draw:z-index="4"><draw:text-box fo:min-height="5.2917in"><text:p text:style-name="Slika"><draw:frame draw:style-name="fr6" draw:name="Image2" text:anchor-type="paragraph" svg:width="6.6146in" style:rel-width="100%" svg:height="5.2917in" style:rel-height="scale" draw:z-index="5"><draw:image xlink:href="Pictures/100000000000027B000001FCA96CCC01ECF13597.png" xlink:type="simple" xlink:show="embed" xlink:actuate="onLoad" loext:mime-type="image/png"/></draw:frame>Slika <text:sequence text:ref-name="refSlika1" text:name="Slika" text:formula="ooow:Slika+1" style:num-format="1">2</text:sequence>: Model <text:span text:style-name="T1">recom</text:span><text:span text:style-name="T27">m</text:span><text:span text:style-name="T1">endations</text:span> baze</text:p></draw:text-box></draw:frame></text:p>
      <text:p text:style-name="P30"/>
      <text:p text:style-name="P26">Korišćenjem komandi za prikazivanje indeksa i constraint-a može se uočiti <text:span text:style-name="T79">da</text:span></text:p>
      <text:list xml:id="list320124204" text:style-name="L8">
        <text:list-item>
          <text:p text:style-name="P86">U bazi postoji LOOKUP index za <text:span text:style-name="T1">čvorove, </text:span><text:span text:style-name="T31">ali ne postoji index za relacije - treba ga dodati</text:span></text:p>
        </text:list-item>
      </text:list>
      <text:list xml:id="list2700357221" text:style-name="L9">
        <text:list-item>
          <text:p text:style-name="P82">Trenutno u bazi postoje samo UNIQUENESS constraint-i<text:span text:style-name="T81"> (Slika 3)</text:span> i svaki od njih ima <text:span text:style-name="T80">RANGE indeks</text:span><text:span text:style-name="T81"> (Slike 2)</text:span><text:span text:style-name="T82">, koji može da bude koristan za operator jednakosti, meuđutim treba razmotriti da li TEXT index donosi benefit u tim slučajevima zato što su property-ji (o kojima je reč) stringovi</text:span></text:p>
        </text:list-item>
      </text:list>
      <text:p text:style-name="P26"/>
      <text:p text:style-name="P26"><draw:frame draw:style-name="fr3" draw:name="Frame3" text:anchor-type="char" svg:x="0in" svg:y="0.0728in" svg:width="6.6929in" draw:z-index="6"><draw:text-box fo:min-height="2.1728in"><text:p text:style-name="Slika"><draw:frame draw:style-name="fr6" draw:name="Image3" text:anchor-type="paragraph" svg:width="6.6929in" style:rel-width="100%" svg:height="2.1728in" style:rel-height="scale" draw:z-index="7"><draw:image xlink:href="Pictures/10000000000005BA000001DC3B1383D23C76AEA8.png" xlink:type="simple" xlink:show="embed" xlink:actuate="onLoad" loext:mime-type="image/png"/></draw:frame>Slika <text:sequence text:ref-name="refSlika2" text:name="Slika" text:formula="ooow:Slika+1" style:num-format="1">3</text:sequence>: Constraint-i <text:span text:style-name="T29">koje je generisalo</text:span> <text:span text:style-name="T29">okruženje</text:span></text:p></draw:text-box></draw:frame><text:soft-page-break/></text:p>
      <text:p text:style-name="P26"><draw:frame draw:style-name="fr2" draw:name="Frame4" text:anchor-type="char" svg:width="6.6929in" draw:z-index="8"><draw:text-box fo:min-height="2.8201in"><text:p text:style-name="Slika"><draw:frame draw:style-name="fr6" draw:name="Image4" text:anchor-type="paragraph" svg:width="6.6929in" style:rel-width="100%" svg:height="2.8201in" style:rel-height="scale" draw:z-index="9"><draw:image xlink:href="Pictures/1000000000000690000002C45639B0D12C6C5D89.png" xlink:type="simple" xlink:show="embed" xlink:actuate="onLoad" loext:mime-type="image/png"/></draw:frame>Slika <text:sequence text:ref-name="refSlika3" text:name="Slika" text:formula="ooow:Slika+1" style:num-format="1">4</text:sequence>: Indeksi koje je generisalo okruženje</text:p></draw:text-box></draw:frame></text:p>
      <text:h text:style-name="P65" text:outline-level="2"><text:bookmark-start text:name="__RefHeading___Toc3100_4290455764"/>Primer lookup indeksa<text:bookmark-end text:name="__RefHeading___Toc3100_4290455764"/></text:h>
      <text:p text:style-name="P31">Kada se uporedi broj čvorova koji predstavljaju film (Slika 5) </text:p>
      <text:p text:style-name="P31"><draw:frame draw:style-name="fr1" draw:name="Frame5" text:anchor-type="char" svg:x="1.1335in" svg:y="0.1528in" svg:width="4.4272in" draw:z-index="10"><draw:text-box fo:min-height="1.4791in"><text:p text:style-name="Slika"><draw:frame draw:style-name="fr5" draw:name="Image5" text:anchor-type="paragraph" svg:x="0in" svg:y="-0.1992in" svg:width="4.4272in" style:rel-width="100%" svg:height="1.4791in" style:rel-height="scale" draw:z-index="11"><draw:image xlink:href="Pictures/10000000000001A90000008EB9251783390F860D.png" xlink:type="simple" xlink:show="embed" xlink:actuate="onLoad" loext:mime-type="image/png"/></draw:frame>Slika <text:sequence text:ref-name="refSlika4" text:name="Slika" text:formula="ooow:Slika+1" style:num-format="1">5</text:sequence>: Broj filmova</text:p></draw:text-box></draw:frame></text:p>
      <text:p text:style-name="P50"><text:span text:style-name="T1">sa brojem </text:span><text:span text:style-name="T32">DbHit-ova</text:span><text:span text:style-name="T1"> </text:span><text:span text:style-name="T32">kada se pretražuju filmovi:</text:span></text:p>
      <text:p text:style-name="P14"><text:span text:style-name="T84">PROFILE</text:span><text:span text:style-name="T86"> </text:span><text:span text:style-name="T84">MATCH</text:span><text:span text:style-name="T86"> </text:span><text:span text:style-name="T88">(</text:span><text:span text:style-name="T86">p</text:span><text:span text:style-name="T88">:</text:span><text:span text:style-name="T86">Person</text:span><text:span text:style-name="T88">)-[:</text:span><text:span text:style-name="T86">ACTED_IN</text:span><text:span text:style-name="T88">]-&gt;(</text:span><text:span text:style-name="T86">m</text:span><text:span text:style-name="T88">:</text:span><text:span text:style-name="T86">Movie</text:span><text:span text:style-name="T88">)&lt;-[:</text:span><text:span text:style-name="T86">DIRECTED</text:span><text:span text:style-name="T88">]-(</text:span><text:span text:style-name="T86">p2</text:span><text:span text:style-name="T88">:</text:span><text:span text:style-name="T86">Person</text:span><text:span text:style-name="T88">)</text:span></text:p>
      <text:p text:style-name="P13"><text:span text:style-name="T83">WHERE</text:span><text:span text:style-name="T85"> p</text:span><text:span text:style-name="T87">.</text:span><text:span text:style-name="T85">name </text:span><text:span text:style-name="T87">=</text:span><text:span text:style-name="T85"> p2</text:span><text:span text:style-name="T87">.</text:span><text:span text:style-name="T85">name</text:span></text:p>
      <text:p text:style-name="P13"><text:soft-page-break/><text:span text:style-name="T83">RETURN</text:span><text:span text:style-name="T85"> p</text:span></text:p>
      <text:p text:style-name="P39"/>
      <text:p text:style-name="P39"><draw:frame draw:style-name="fr4" draw:name="Image6" text:anchor-type="char" svg:x="0in" svg:y="0.1535in" svg:width="6.6929in" svg:height="2.4161in" draw:z-index="12"><draw:image xlink:href="Pictures/1000000000000582000001FD86DD8A6C4E13FDBD.png" xlink:type="simple" xlink:show="embed" xlink:actuate="onLoad" loext:mime-type="image/png"/></draw:frame></text:p>
      <text:p text:style-name="P40">Da ne postoji taj indeks, ceo graf bi morao da se pretraži još u prvom koraku, kao ovde:</text:p>
      <text:p text:style-name="P15"><text:span text:style-name="T83">PROFILE</text:span><text:span text:style-name="T85"> </text:span><text:span text:style-name="T83">MATCH</text:span><text:span text:style-name="T85"> </text:span><text:span text:style-name="T87">()-[</text:span><text:span text:style-name="T85">r</text:span><text:span text:style-name="T87">:</text:span><text:span text:style-name="T85">DIRECTED</text:span><text:span text:style-name="T87">]-()</text:span><text:span text:style-name="T85"> </text:span><text:span text:style-name="T83">RETURN</text:span><text:span text:style-name="T85"> r</text:span></text:p>
      <text:p text:style-name="P51"/>
      <text:p text:style-name="P51"><draw:frame draw:style-name="fr4" draw:name="Image7" text:anchor-type="char" svg:x="0in" svg:y="0.1146in" svg:width="6.6929in" svg:height="1.8354in" draw:z-index="13"><draw:image xlink:href="Pictures/10000000000005660000017B36275B4AEE5D7D2D.png" xlink:type="simple" xlink:show="embed" xlink:actuate="onLoad" loext:mime-type="image/png"/></draw:frame></text:p>
      <text:p text:style-name="P20">Nakon dodavanja indeksa plan izgleda dosta druga<text:span text:style-name="T1">čije</text:span>:</text:p>
      <text:p text:style-name="P16"><text:span text:style-name="T83">CREATE</text:span><text:span text:style-name="T85"> LOOKUP </text:span><text:span text:style-name="T83">INDEX</text:span><text:span text:style-name="T85"> rel_type_lookup_index </text:span><text:span text:style-name="T83">FOR</text:span><text:span text:style-name="T85"> </text:span><text:span text:style-name="T87">()-[</text:span><text:span text:style-name="T85">r</text:span><text:span text:style-name="T87">]-()</text:span><text:span text:style-name="T85"> </text:span><text:span text:style-name="T83">ON</text:span><text:span text:style-name="T85"> EACH type</text:span><text:span text:style-name="T87">(</text:span><text:span text:style-name="T85">r</text:span><text:span text:style-name="T87">)</text:span></text:p>
      <text:p text:style-name="P20"/>
      <text:p text:style-name="P20"><draw:frame draw:style-name="fr4" draw:name="Image8" text:anchor-type="char" svg:x="-0.0283in" svg:y="0.0071in" svg:width="6.6929in" svg:height="2.152in" draw:z-index="14"><draw:image xlink:href="Pictures/1000000000000574000001C19D0B1DE83F53BCAB.png" xlink:type="simple" xlink:show="embed" xlink:actuate="onLoad" loext:mime-type="image/png"/></draw:frame></text:p>
      <text:p text:style-name="P35"><text:soft-page-break/>Zato je preporuka da se ovi indeksi ne brišu; svaki graf bi trebalo na početku da ima ova dva indeksa (ako se koristi nova verzija). </text:p>
      <text:h text:style-name="P66" text:outline-level="2"><text:bookmark-start text:name="__RefHeading___Toc3102_4290455764"/>Primer full-text indeksa<text:bookmark-end text:name="__RefHeading___Toc3102_4290455764"/></text:h>
      <text:p text:style-name="P38"/>
      <text:h text:style-name="P63" text:outline-level="1"><text:bookmark-start text:name="__RefHeading___Toc19124_3731682282"/>Reference<text:bookmark-end text:name="__RefHeading___Toc19124_3731682282"/></text:h>
      <text:p text:style-name="P3">[1] Neo4j Cypher Manual <text:a xlink:type="simple" xlink:href="https://neo4j.com/docs/cypher-manual/current/execution-plans/" text:style-name="Internet_20_link" text:visited-style-name="Visited_20_Internet_20_Link"><text:span text:style-name="T21">https://neo4j.com/docs/cypher-manual/</text:span></text:a><text:span text:style-name="T24">25</text:span><text:a xlink:type="simple" xlink:href="https://neo4j.com/docs/cypher-manual/current/execution-plans/" text:style-name="Internet_20_link" text:visited-style-name="Visited_20_Internet_20_Link"><text:span text:style-name="T21">/execution-plans/</text:span></text:a></text:p>
      <text:p text:style-name="P3"/>
      <text:p text:style-name="P3">[2] <text:span text:style-name="T10">What is DBMS? </text:span><text:a xlink:type="simple" xlink:href="https://www.appdynamics.com/topics/database-management-systems" text:style-name="Internet_20_link" text:visited-style-name="Visited_20_Internet_20_Link"><text:span text:style-name="T70">https://www.appdynamics.com/topics/database-management-systems</text:span></text:a></text:p>
      <text:p text:style-name="P3"/>
      <text:p text:style-name="P3">[3] <text:span text:style-name="T14">Overview of storage and indexing </text:span><text:a xlink:type="simple" xlink:href="https://coursys.sfu.ca/2016su-cmpt-354-d1/pages/MYCH8.pdf/view" text:style-name="Internet_20_link" text:visited-style-name="Visited_20_Internet_20_Link"><text:span text:style-name="T23">https://coursys.sfu.ca/2016su-cmpt-354-d1/pages/MYCH8.pdf/view</text:span></text:a></text:p>
      <text:p text:style-name="P3"/>
      <text:p text:style-name="P3">[4] <text:span text:style-name="T26">Recommendation dataset </text:span><text:a xlink:type="simple" xlink:href="https://github.com/neo4j-graph-examples/recommendations" text:style-name="Internet_20_link" text:visited-style-name="Visited_20_Internet_20_Link"><text:span text:style-name="T70">github.com/neo4j-graph-examples/recommendations</text:span></text:a></text:p>
      <text:p text:style-name="P3"/>
      <text:p text:style-name="P2">[5] Neo4j Sandbox <text:a xlink:type="simple" xlink:href="https://neo4j.com/sandbox/" text:style-name="Internet_20_link" text:visited-style-name="Visited_20_Internet_20_Link"><text:span text:style-name="T70">https://neo4j.com/sandbox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Mono1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Lucida Sans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23:06:41.736000000</meta:creation-date>
    <dc:date>2026-04-30T23:50:27.357292382</dc:date>
    <meta:editing-duration>P11DT11H17M5S</meta:editing-duration>
    <meta:editing-cycles>28</meta:editing-cycles>
    <meta:generator>LibreOffice/6.4.7.2$Linux_X86_64 LibreOffice_project/40$Build-2</meta:generator>
    <meta:document-statistic meta:table-count="0" meta:image-count="10" meta:object-count="0" meta:page-count="14" meta:paragraph-count="113" meta:word-count="1982" meta:character-count="12932" meta:non-whitespace-character-count="11058"/>
  </office:meta>
</office:document-meta>
</file>