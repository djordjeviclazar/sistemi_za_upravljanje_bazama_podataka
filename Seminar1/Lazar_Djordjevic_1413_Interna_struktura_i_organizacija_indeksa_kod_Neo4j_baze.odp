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1000000B440B9C557B683594A.png" manifest:media-type="image/png"/>
  <manifest:file-entry manifest:full-path="Pictures/100000000000011500000291E78F8A321BDE5EE4.png" manifest:media-type="image/png"/>
  <manifest:file-entry manifest:full-path="Pictures/10000000000000DA000000A97DD9BB2D1FEDABD1.png" manifest:media-type="image/png"/>
  <manifest:file-entry manifest:full-path="Pictures/10000000000001A20000001DC647646B0741F20B.png" manifest:media-type="image/png"/>
  <manifest:file-entry manifest:full-path="Pictures/100000000000017A00000024D42BE2F4C4DF41C3.png" manifest:media-type="image/png"/>
  <manifest:file-entry manifest:full-path="Pictures/100000000000014E0000003F21A43ED85D549A3D.png" manifest:media-type="image/png"/>
  <manifest:file-entry manifest:full-path="Pictures/10000000000001930000001F8FC1FE30F8E59A5E.png" manifest:media-type="image/png"/>
  <manifest:file-entry manifest:full-path="Pictures/10000000000000EA000002146254B60419716BCE.png" manifest:media-type="image/png"/>
  <manifest:file-entry manifest:full-path="Pictures/10000000000001A70000003BA0B80C2A01C86A17.png" manifest:media-type="image/png"/>
  <manifest:file-entry manifest:full-path="Pictures/100002010000012C0000012C7CB16FF661F3177A.png" manifest:media-type="image/png"/>
  <manifest:file-entry manifest:full-path="Pictures/10000000000000C100000255D0D60875A39E30A7.png" manifest:media-type="image/png"/>
  <manifest:file-entry manifest:full-path="Pictures/10000000000005660000017B36275B4AEE5D7D2D.png" manifest:media-type="image/png"/>
  <manifest:file-entry manifest:full-path="Pictures/10000000000001860000002CB76B1FD116BB2CE6.png" manifest:media-type="image/png"/>
  <manifest:file-entry manifest:full-path="Pictures/1000000000000582000001FD86DD8A6C4E13FDBD.png" manifest:media-type="image/png"/>
  <manifest:file-entry manifest:full-path="Pictures/10000000000002F80000004DFF5B4E490763BC24.png" manifest:media-type="image/png"/>
  <manifest:file-entry manifest:full-path="Pictures/10000000000001C70000002D6AD37F8CC02977F4.png" manifest:media-type="image/png"/>
  <manifest:file-entry manifest:full-path="Pictures/100000000000027B000001FCA96CCC01ECF13597.png" manifest:media-type="image/png"/>
  <manifest:file-entry manifest:full-path="Pictures/10000000000002F70000003107AB4BCA6CF48DF6.png" manifest:media-type="image/png"/>
  <manifest:file-entry manifest:full-path="Pictures/10000000000001900000002923CD5444ADFAB117.png" manifest:media-type="image/png"/>
  <manifest:file-entry manifest:full-path="Pictures/10000000000002070000004E4A4DE62F267E58B3.png" manifest:media-type="image/png"/>
  <manifest:file-entry manifest:full-path="Pictures/1000000000000574000001C19D0B1DE83F53BCAB.png" manifest:media-type="image/png"/>
  <manifest:file-entry manifest:full-path="Pictures/1000000000000100000000521B40797D3BA976FF.png" manifest:media-type="image/png"/>
  <manifest:file-entry manifest:full-path="Pictures/100000000000018D0000002B3460315D9F86A7CF.png" manifest:media-type="image/png"/>
  <manifest:file-entry manifest:full-path="Pictures/10000201000006CB000003E600B6923C86DC5C62.png" manifest:media-type="image/png"/>
  <manifest:file-entry manifest:full-path="Pictures/10000000000000CC00000235965BA153AB9C19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ourse Sans Pro" svg:font-family="'Sourse Sans Pro'" style:font-family-generic="swiss"/>
    <style:font-face style:name="Liberation Mono2" svg:font-family="'Liberation Mono', 'Courier New'" style:font-family-generic="modern" style:font-pitch="fixed"/>
    <style:font-face style:name="NSimSun3" svg:font-family="NSimSun" style:font-family-generic="modern" style:font-pitch="fixed"/>
    <style:font-face style:name="Microsoft YaHei1" svg:font-family="'Microsoft YaHei'" style:font-pitch="variable"/>
    <style:font-face style:name="NSimSun1" svg:font-family="NSimSun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1" svg:font-family="'Source Sans Pro Light'" style:font-adornments="Ligera" style:font-pitch="variable"/>
    <style:font-face style:name="Liberation Mono1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URW Gothic L1" svg:font-family="'URW Gothic L'" style:font-family-generic="roman" style:font-pitch="variable"/>
    <style:font-face style:name="URW Gothic L2" svg:font-family="'URW Gothic L'" style:font-adornments="Book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Sourse Sans Pro1" svg:font-family="'Sourse Sans Pro'" style:font-family-generic="swiss" style:font-pitch="variable"/>
    <style:font-face style:name="URW Gothic L" svg:font-family="'URW Gothic L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1.66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Vivid-title">
      <style:graphic-properties draw:auto-grow-height="true" fo:min-height="9cm"/>
      <style:paragraph-properties style:writing-mode="lr-tb"/>
    </style:style>
    <style:style style:name="pr2" style:family="presentation" style:parent-style-name="Vivid-subtitle">
      <style:graphic-properties draw:fill-color="#ffffff" draw:auto-grow-height="false" draw:fit-to-size="shrink-to-fit" style:shrink-to-fi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1.672cm"/>
      <style:paragraph-properties style:writing-mode="lr-tb"/>
    </style:style>
    <style:style style:name="pr4" style:family="presentation" style:parent-style-name="BrightBlue-title">
      <style:graphic-properties draw:auto-grow-height="true" fo:min-height="3.583cm"/>
      <style:paragraph-properties style:writing-mode="lr-tb"/>
    </style:style>
    <style:style style:name="pr5" style:family="presentation" style:parent-style-name="BrightBlue-outline1">
      <style:graphic-properties fo:min-height="3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Typography-title">
      <style:graphic-properties draw:auto-grow-height="true" fo:min-height="11.388cm"/>
      <style:paragraph-properties style:writing-mode="lr-tb"/>
    </style:style>
    <style:style style:name="pr8" style:family="presentation" style:parent-style-name="Typography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style:font-name="Sourse Sans Pro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Interna struktura i indeksi u Neo4j</text:span></text:p>
          </draw:text-box>
        </draw:frame>
        <draw:frame presentation:style-name="pr2" draw:text-style-name="P4" draw:layer="layout" svg:width="25cm" svg:height="3.25cm" svg:x="1.25cm" svg:y="10.75cm" presentation:class="subtitle" presentation:user-transformed="true">
          <draw:text-box>
            <text:p text:style-name="P3">Mentor: Doc. dr. Aleksandar Stanimirović</text:p>
            <text:p>Student: Lazar Đorđević</text:p>
            <text:p/>
            <text:p/>
          </draw:text-box>
        </draw:frame>
        <draw:frame draw:style-name="gr1" draw:text-style-name="P5" draw:layer="layout" svg:width="6.35cm" svg:height="6.35cm" svg:x="20.32cm" svg:y="0.635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2" draw:text-style-name="P6" draw:layer="layout" svg:width="4.363cm" svg:height="1.187cm" svg:x="3.361cm" svg:y="14.253cm">
          <draw:text-box>
            <text:p><text:date style:data-style-name="D4" text:date-value="2026-04-30">04/30/2026</text:date></text:p>
          </draw:text-box>
        </draw:frame>
        <draw:frame draw:style-name="gr3" draw:text-style-name="P6" draw:layer="layout" svg:width="2.167cm" svg:height="1.187cm" svg:x="1.905cm" svg:y="14.253cm">
          <draw:text-box>
            <text:p>Niš, </text:p>
          </draw:text-box>
        </draw:frame>
        <presentation:notes draw:style-name="dp2">
          <draw:page-thumbnail draw:style-name="gr4" draw:layer="layout" svg:width="12.674cm" svg:height="9.726cm" svg:x="4.456cm" svg:y="2.97cm" draw:page-number="1" presentation:class="page"/>
          <draw:frame presentation:style-name="pr3" draw:text-style-name="P4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Indeksi u bazama podataka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Implementacija</text:p>
                <text:list>
                  <text:list-item>
                    <text:p>Stablo</text:p>
                  </text:list-item>
                  <text:list-item>
                    <text:p>Heš</text:p>
                  </text:list-item>
                </text:list>
              </text:list-item>
              <text:list-item>
                <text:p>Svrha – pretraga sa što manje pristupa disku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Graf baza</text:p>
                <text:list>
                  <text:list-item>
                    <text:p>Labeled property model</text:p>
                    <text:list>
                      <text:list-item>
                        <text:p>Čvor</text:p>
                      </text:list-item>
                      <text:list-item>
                        <text:p>Relacija</text:p>
                      </text:list-item>
                      <text:list-item>
                        <text:p>Property</text:p>
                      </text:list-item>
                      <text:list-item>
                        <text:p>Labela</text:p>
                      </text:list-item>
                    </text:list>
                  </text:list-item>
                </text:list>
              </text:list-item>
              <text:list-item>
                <text:p>Predikati</text:p>
                <text:list>
                  <text:list-item>
                    <text:list>
                      <text:list-item>
                        <text:p>equality check</text:p>
                      </text:list-item>
                      <text:list-item>
                        <text:p>list membership check</text:p>
                      </text:list-item>
                      <text:list-item>
                        <text:p>existence check</text:p>
                      </text:list-item>
                      <text:list-item>
                        <text:p>range search</text:p>
                      </text:list-item>
                      <text:list-item>
                        <text:p>prefix search</text:p>
                      </text:list-item>
                      <text:list-item>
                        <text:p>sufix search</text:p>
                      </text:list-item>
                      <text:list-item>
                        <text:p>substring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Constraint</text:p>
                <text:list>
                  <text:list-item>
                    <text:p>Unique node property</text:p>
                  </text:list-item>
                  <text:list-item>
                    <text:p>Unique relationship property</text:p>
                  </text:list-item>
                  <text:list-item>
                    <text:p>Node property existence</text:p>
                  </text:list-item>
                  <text:list-item>
                    <text:p>Relationship property existence</text:p>
                  </text:list-item>
                  <text:list-item>
                    <text:p>Node key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Indeksi</text:p>
                <text:list>
                  <text:list-item>
                    <text:p>Singl</text:p>
                  </text:list-item>
                  <text:list-item>
                    <text:p>Kompozitni</text:p>
                    <text:list>
                      <text:list-item>
                        <text:p>equality check i list membership check uvek na početku</text:p>
                      </text:list-item>
                      <text:list-item>
                        <text:p>Najviše jedan range search ili prefix search</text:p>
                      </text:list-item>
                      <text:list-item>
                        <text:p>Može biti više existence check</text:p>
                      </text:list-item>
                      <text:list-item>
                        <text:p>Svaki predikat nakon range search, prefix search ili existence check mora biti existence chec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 text:style-name="P8">Tipovi indeksa</text:p>
                <text:list>
                  <text:list-item>
                    <text:p>Lookup</text:p>
                    <text:list>
                      <text:list-item>
                        <text:p>Node</text:p>
                      </text:list-item>
                      <text:list-item>
                        <text:p>Relationship</text:p>
                      </text:list-item>
                    </text:list>
                  </text:list-item>
                  <text:list-item>
                    <text:p>Range</text:p>
                    <text:list>
                      <text:list-item>
                        <text:p>B-stablo</text:p>
                      </text:list-item>
                      <text:list-item>
                        <text:p>Podržava sve operacije</text:p>
                      </text:list-item>
                    </text:list>
                  </text:list-item>
                  <text:list-item>
                    <text:p>Text</text:p>
                    <text:list>
                      <text:list-item>
                        <text:p>Podržava string i listu</text:p>
                      </text:list-item>
                      <text:list-item>
                        <text:p>Ne može da bude kompozitni</text:p>
                      </text:list-item>
                      <text:list-item>
                        <text:p>Koristan za ENDS WITH i CONTAINS operatore</text:p>
                      </text:list-item>
                    </text:list>
                  </text:list-item>
                  <text:list-item>
                    <text:p>Point</text:p>
                    <text:list>
                      <text:list-item>
                        <text:p>B-stablo</text:p>
                      </text:list-item>
                      <text:list-item>
                        <text:p>Podržava spatial vrednosti (point)</text:p>
                      </text:list-item>
                    </text:list>
                  </text:list-item>
                  <text:list-item>
                    <text:p>Full-text </text:p>
                    <text:list>
                      <text:list-item>
                        <text:p>Apache Lucene biblioteka (db.index.fulltext)</text:p>
                      </text:list-item>
                      <text:list-item>
                        <text:p>Za složenije upite nad tekstualnim podacima</text:p>
                      </text:list-item>
                      <text:list-item>
                        <text:p>Da bi se indeks koristio mora da se pozove posebna procedura: db.index.fulltext.queryNodes/Relationship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Metrika</text:p>
                <text:list>
                  <text:list-item>
                    <text:p>DBHit</text:p>
                  </text:list-item>
                  <text:list-item>
                    <text:p>Vreme izvršenja</text:p>
                  </text:list-item>
                </text:list>
              </text:list-item>
              <text:list-item>
                <text:p>Model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12.99cm" svg:height="10.392cm" svg:x="11.43cm" svg:y="3.81cm">
          <draw:image xlink:href="Pictures/100000000000027B000001FCA96CCC01ECF135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20.319cm" svg:height="7.334cm" svg:x="1.906cm" svg:y="7.62cm">
          <draw:image xlink:href="Pictures/1000000000000582000001FD86DD8A6C4E13FDBD.png" xlink:type="simple" xlink:show="embed" xlink:actuate="onLoad" loext:mime-type="image/png">
            <text:p/>
          </draw:image>
        </draw:frame>
        <draw:frame draw:style-name="gr1" draw:text-style-name="P5" draw:layer="layout" svg:width="20.107cm" svg:height="2.036cm" svg:x="1.905cm" svg:y="5.584cm">
          <draw:image xlink:href="Pictures/10000000000002F80000004DFF5B4E490763BC2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12.038cm" svg:height="1.19cm" svg:x="3.175cm" svg:y="5.16cm">
          <draw:image xlink:href="Pictures/10000000000001C70000002D6AD37F8CC02977F4.png" xlink:type="simple" xlink:show="embed" xlink:actuate="onLoad" loext:mime-type="image/png">
            <text:p/>
          </draw:image>
        </draw:frame>
        <draw:frame draw:style-name="gr1" draw:text-style-name="P5" draw:layer="layout" svg:width="27.999cm" svg:height="7.678cm" svg:x="0.001cm" svg:y="6.927cm">
          <draw:image xlink:href="Pictures/10000000000005660000017B36275B4AEE5D7D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12.038cm" svg:height="1.19cm" svg:x="2.144cm" svg:y="6.35cm">
          <draw:image xlink:href="Pictures/10000000000001C70000002D6AD37F8CC02977F4.png" xlink:type="simple" xlink:show="embed" xlink:actuate="onLoad" loext:mime-type="image/png">
            <text:p/>
          </draw:image>
        </draw:frame>
        <draw:frame draw:style-name="gr1" draw:text-style-name="P5" draw:layer="layout" svg:width="20.081cm" svg:height="1.295cm" svg:x="2.144cm" svg:y="5.055cm">
          <draw:image xlink:href="Pictures/10000000000002F70000003107AB4BCA6CF48DF6.png" xlink:type="simple" xlink:show="embed" xlink:actuate="onLoad" loext:mime-type="image/png">
            <text:p/>
          </draw:image>
        </draw:frame>
        <draw:frame draw:style-name="gr1" draw:text-style-name="P5" draw:layer="layout" svg:width="22.86cm" svg:height="7.352cm" svg:x="1.905cm" svg:y="7.888cm">
          <draw:image xlink:href="Pictures/1000000000000574000001C19D0B1DE83F53BC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13.731cm" svg:height="2.063cm" svg:x="2.54cm" svg:y="5.08cm">
          <draw:image xlink:href="Pictures/10000000000002070000004E4A4DE62F267E58B3.png" xlink:type="simple" xlink:show="embed" xlink:actuate="onLoad" loext:mime-type="image/png">
            <text:p/>
          </draw:image>
        </draw:frame>
        <draw:frame draw:style-name="gr1" draw:text-style-name="P5" draw:layer="layout" svg:width="6.772cm" svg:height="2.169cm" svg:x="2.54cm" svg:y="7.143cm">
          <draw:image xlink:href="Pictures/1000000000000100000000521B40797D3BA976FF.png" xlink:type="simple" xlink:show="embed" xlink:actuate="onLoad" loext:mime-type="image/png">
            <text:p/>
          </draw:image>
        </draw:frame>
        <draw:frame draw:style-name="gr1" draw:text-style-name="P5" draw:layer="layout" svg:width="4.127cm" svg:height="11.43cm" svg:x="17.78cm" svg:y="3.81cm">
          <draw:image xlink:href="Pictures/10000000000000CC00000235965BA153AB9C19E3.png" xlink:type="simple" xlink:show="embed" xlink:actuate="onLoad" loext:mime-type="image/png">
            <text:p/>
          </draw:image>
        </draw:frame>
        <draw:frame draw:style-name="gr1" draw:text-style-name="P5" draw:layer="layout" svg:width="10.582cm" svg:height="1.084cm" svg:x="2.54cm" svg:y="9.711cm">
          <draw:image xlink:href="Pictures/10000000000001900000002923CD5444ADFAB11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11.191cm" svg:height="1.56cm" svg:x="2.54cm" svg:y="5.425cm">
          <draw:image xlink:href="Pictures/10000000000001A70000003BA0B80C2A01C86A17.png" xlink:type="simple" xlink:show="embed" xlink:actuate="onLoad" loext:mime-type="image/png">
            <text:p/>
          </draw:image>
        </draw:frame>
        <draw:frame draw:style-name="gr1" draw:text-style-name="P5" draw:layer="layout" svg:width="5.027cm" svg:height="11.43cm" svg:x="16.747cm" svg:y="3.81cm">
          <draw:image xlink:href="Pictures/10000000000000EA000002146254B60419716BCE.png" xlink:type="simple" xlink:show="embed" xlink:actuate="onLoad" loext:mime-type="image/png">
            <text:p/>
          </draw:image>
        </draw:frame>
        <draw:frame draw:style-name="gr1" draw:text-style-name="P5" draw:layer="layout" svg:width="8.836cm" svg:height="1.666cm" svg:x="2.54cm" svg:y="7.224cm">
          <draw:image xlink:href="Pictures/100000000000014E0000003F21A43ED85D549A3D.png" xlink:type="simple" xlink:show="embed" xlink:actuate="onLoad" loext:mime-type="image/png">
            <text:p/>
          </draw:image>
        </draw:frame>
        <draw:frame draw:style-name="gr1" draw:text-style-name="P5" draw:layer="layout" svg:width="10cm" svg:height="0.952cm" svg:x="2.54cm" svg:y="9.525cm">
          <draw:image xlink:href="Pictures/100000000000017A00000024D42BE2F4C4DF41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6.772cm" svg:height="2.169cm" svg:x="2.54cm" svg:y="7.143cm">
          <draw:image xlink:href="Pictures/1000000000000100000000521B40797D3BA976FF.png" xlink:type="simple" xlink:show="embed" xlink:actuate="onLoad" loext:mime-type="image/png">
            <text:p/>
          </draw:image>
        </draw:frame>
        <draw:frame draw:style-name="gr1" draw:text-style-name="P5" draw:layer="layout" svg:width="10.318cm" svg:height="1.163cm" svg:x="2.54cm" svg:y="5.187cm">
          <draw:image xlink:href="Pictures/10000000000001860000002CB76B1FD116BB2CE6.png" xlink:type="simple" xlink:show="embed" xlink:actuate="onLoad" loext:mime-type="image/png">
            <text:p/>
          </draw:image>
        </draw:frame>
        <draw:frame draw:style-name="gr1" draw:text-style-name="P5" draw:layer="layout" svg:width="11.059cm" svg:height="0.766cm" svg:x="2.54cm" svg:y="10.16cm">
          <draw:image xlink:href="Pictures/10000000000001A20000001DC647646B0741F20B.png" xlink:type="simple" xlink:show="embed" xlink:actuate="onLoad" loext:mime-type="image/png">
            <text:p/>
          </draw:image>
        </draw:frame>
        <draw:frame draw:style-name="gr1" draw:text-style-name="P5" draw:layer="layout" svg:width="4.809cm" svg:height="11.409cm" svg:x="14.876cm" svg:y="3.81cm">
          <draw:image xlink:href="Pictures/100000000000011500000291E78F8A321BDE5EE4.png" xlink:type="simple" xlink:show="embed" xlink:actuate="onLoad" loext:mime-type="image/png">
            <text:p/>
          </draw:image>
        </draw:frame>
        <draw:frame draw:style-name="gr1" draw:text-style-name="P5" draw:layer="layout" svg:width="5.529cm" svg:height="4.762cm" svg:x="20.971cm" svg:y="6.668cm">
          <draw:image xlink:href="Pictures/10000000000000D1000000B440B9C557B68359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text-style-name="P7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5" draw:layer="layout" svg:width="3.125cm" svg:height="3.125cm" svg:x="23.11cm" svg:y="0.301cm">
          <draw:image xlink:href="Pictures/100002010000012C0000012C7CB16FF661F3177A.png" xlink:type="simple" xlink:show="embed" xlink:actuate="onLoad" loext:mime-type="image/png">
            <text:p/>
          </draw:image>
        </draw:frame>
        <draw:frame draw:style-name="gr1" draw:text-style-name="P5" draw:layer="layout" svg:width="6.772cm" svg:height="2.169cm" svg:x="2.54cm" svg:y="6.721cm">
          <draw:image xlink:href="Pictures/1000000000000100000000521B40797D3BA976FF.png" xlink:type="simple" xlink:show="embed" xlink:actuate="onLoad" loext:mime-type="image/png">
            <text:p/>
          </draw:image>
        </draw:frame>
        <draw:frame draw:style-name="gr1" draw:text-style-name="P5" draw:layer="layout" svg:width="10.503cm" svg:height="1.137cm" svg:x="2.54cm" svg:y="5.213cm">
          <draw:image xlink:href="Pictures/100000000000018D0000002B3460315D9F86A7CF.png" xlink:type="simple" xlink:show="embed" xlink:actuate="onLoad" loext:mime-type="image/png">
            <text:p/>
          </draw:image>
        </draw:frame>
        <draw:frame draw:style-name="gr1" draw:text-style-name="P5" draw:layer="layout" svg:width="10.662cm" svg:height="0.819cm" svg:x="2.54cm" svg:y="9.525cm">
          <draw:image xlink:href="Pictures/10000000000001930000001F8FC1FE30F8E59A5E.png" xlink:type="simple" xlink:show="embed" xlink:actuate="onLoad" loext:mime-type="image/png">
            <text:p/>
          </draw:image>
        </draw:frame>
        <draw:frame draw:style-name="gr1" draw:text-style-name="P5" draw:layer="layout" svg:width="3.893cm" svg:height="12.044cm" svg:x="15.157cm" svg:y="3.706cm">
          <draw:image xlink:href="Pictures/10000000000000C100000255D0D60875A39E30A7.png" xlink:type="simple" xlink:show="embed" xlink:actuate="onLoad" loext:mime-type="image/png">
            <text:p/>
          </draw:image>
        </draw:frame>
        <draw:frame draw:style-name="gr1" draw:text-style-name="P5" draw:layer="layout" svg:width="5.767cm" svg:height="4.47cm" svg:x="19.685cm" svg:y="6.325cm">
          <draw:image xlink:href="Pictures/10000000000000DA000000A97DD9BB2D1FEDAB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Typography" presentation:presentation-page-layout-name="AL1T0">
        <draw:frame presentation:style-name="pr7" draw:text-style-name="P1" draw:layer="layout" svg:width="25.199cm" svg:height="11.388cm" svg:x="1.4cm" svg:y="0.627cm" presentation:class="title" presentation:user-transformed="true">
          <draw:text-box>
            <text:p>Hvala na pažnji!</text:p>
          </draw:text-box>
        </draw:frame>
        <presentation:notes draw:style-name="dp2">
          <draw:page-thumbnail draw:style-name="gr4" draw:layer="layout" svg:width="15.265cm" svg:height="10.475cm" svg:x="3.16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ourse Sans Pro" svg:font-family="'Sourse Sans Pro'" style:font-family-generic="swiss"/>
    <style:font-face style:name="Liberation Mono2" svg:font-family="'Liberation Mono', 'Courier New'" style:font-family-generic="modern" style:font-pitch="fixed"/>
    <style:font-face style:name="NSimSun3" svg:font-family="NSimSun" style:font-family-generic="modern" style:font-pitch="fixed"/>
    <style:font-face style:name="Microsoft YaHei1" svg:font-family="'Microsoft YaHei'" style:font-pitch="variable"/>
    <style:font-face style:name="NSimSun1" svg:font-family="NSimSun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1" svg:font-family="'Source Sans Pro Light'" style:font-adornments="Ligera" style:font-pitch="variable"/>
    <style:font-face style:name="Liberation Mono1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URW Gothic L1" svg:font-family="'URW Gothic L'" style:font-family-generic="roman" style:font-pitch="variable"/>
    <style:font-face style:name="URW Gothic L2" svg:font-family="'URW Gothic L'" style:font-adornments="Book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Sourse Sans Pro1" svg:font-family="'Sourse Sans Pro'" style:font-family-generic="swiss" style:font-pitch="variable"/>
    <style:font-face style:name="URW Gothic L" svg:font-family="'URW Gothic L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2pt" fo:language="en" fo:country="US" style:letter-kerning="true" style:font-name-asian="NSimSun1" style:font-family-asian="NSimSun" style:font-pitch-asian="variable" style:font-size-asian="12pt" style:language-asian="zh" style:country-asian="CN" style:font-name-complex="Liberation Mono2" style:font-family-complex="'Liberation Mono', 'Courier New'" style:font-family-generic-complex="modern" style:font-pitch-complex="fixed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SimSun3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Figure" style:family="graphic">
      <style:paragraph-properties fo:margin-top="0.374cm" fo:margin-bottom="0.374cm" style:text-autospace="none"/>
      <style:text-properties style:font-name="Liberation Mono2" fo:font-family="'Liberation Mono', 'Courier New'" style:font-family-generic="modern" style:font-pitch="fixed" fo:font-size="12pt" fo:font-style="italic" style:font-name-asian="Liberation Mono2" style:font-family-asian="'Liberation Mono', 'Courier New'" style:font-family-generic-asian="modern" style:font-pitch-asian="fixed" style:font-size-asian="12pt" style:font-style-asian="italic" style:font-name-complex="Liberation Mono2" style:font-family-complex="'Liberation Mono', 'Courier New'" style:font-family-generic-complex="modern" style:font-pitch-complex="fixed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Liberation Mono2" fo:font-family="'Liberation Mono', 'Courier New'" style:font-family-generic="modern" style:font-pitch="fixed" fo:font-size="12pt" fo:font-style="italic" style:font-name-asian="Liberation Mono2" style:font-family-asian="'Liberation Mono', 'Courier New'" style:font-family-generic-asian="modern" style:font-pitch-asian="fixed" style:font-size-asian="12pt" style:font-style-asian="italic" style:font-name-complex="Liberation Mono2" style:font-family-complex="'Liberation Mono', 'Courier New'" style:font-family-generic-complex="modern" style:font-pitch-complex="fixed" style:font-size-complex="12pt" style:font-style-complex="italic"/>
    </style:style>
    <style:style style:name="Frame_20_Contents" style:display-name="Frame Conten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complex="Liberation Mono2" style:font-family-complex="'Liberation Mono', 'Courier New'" style:font-family-generic-complex="modern" style:font-pitch-complex="fixed"/>
    </style:style>
    <style:style style:name="Slika" style:family="graphic">
      <style:paragraph-properties fo:margin-top="0.374cm" fo:margin-bottom="0.374cm" style:text-autospace="none"/>
      <style:text-properties style:font-name="Liberation Mono2" fo:font-family="'Liberation Mono', 'Courier New'" style:font-family-generic="modern" style:font-pitch="fixed" fo:font-size="12pt" fo:font-style="italic" style:font-name-asian="Liberation Mono2" style:font-family-asian="'Liberation Mono', 'Courier New'" style:font-family-generic-asian="modern" style:font-pitch-asian="fixed" style:font-size-asian="12pt" style:font-style-asian="italic" style:font-name-complex="Liberation Mono2" style:font-family-complex="'Liberation Mono', 'Courier New'" style:font-family-generic-complex="modern" style:font-pitch-complex="fixed" style:font-size-complex="12pt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2" fo:font-family="'Liberation Mono', 'Courier New'" style:font-family-generic="modern" style:font-pitch="fixed" fo:language="zxx" fo:country="none" style:font-name-asian="Liberation Mono2" style:font-family-asian="'Liberation Mono', 'Courier New'" style:font-family-generic-asian="modern" style:font-pitch-asian="fixed" style:language-asian="zxx" style:country-asian="none" style:font-name-complex="Liberation Mono2" style:font-family-complex="'Liberation Mono', 'Courier New'" style:font-family-generic-complex="modern" style:font-pitch-complex="fixed" style:language-complex="zxx" style:country-complex="none"/>
    </style:style>
    <style:style style:name="Index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 style:font-name-asian="Liberation Mono2" style:font-family-asian="'Liberation Mono', 'Courier New'" style:font-family-generic-asian="modern" style:font-pitch-asian="fixed" style:language-asian="zxx" style:country-asian="none" style:font-name-complex="Liberation Mono2" style:font-family-complex="'Liberation Mono', 'Courier New'" style:font-family-generic-complex="modern" style:font-pitch-complex="fixed" style:language-complex="zxx" style:country-complex="none"/>
    </style:style>
    <style:style style:name="Footnote" style:family="graphic">
      <style:paragraph-properties fo:margin-left="1.058cm" fo:margin-right="0cm" fo:text-indent="-1.058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Endnote" style:family="graphic">
      <style:paragraph-properties fo:margin-left="1.058cm" fo:margin-right="0cm" fo:text-indent="-1.058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2" fo:font-family="'Liberation Mono', 'Courier New'" style:font-family-generic="modern" style:font-pitch="fixed" fo:language="zxx" fo:country="none" style:font-name-asian="Liberation Mono2" style:font-family-asian="'Liberation Mono', 'Courier New'" style:font-family-generic-asian="modern" style:font-pitch-asian="fixed" style:language-asian="zxx" style:country-asian="none" style:font-name-complex="Liberation Mono2" style:font-family-complex="'Liberation Mono', 'Courier New'" style:font-family-generic-complex="modern" style:font-pitch-complex="fixed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="Liberation Mono2" fo:font-family="'Liberation Mono', 'Courier New'" style:font-family-generic="modern" style:font-pitch="fixed" style:font-name-complex="Liberation Mono2" style:font-family-complex="'Liberation Mono', 'Courier New'" style:font-family-generic-complex="modern" style:font-pitch-complex="fixed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Mono2" fo:font-family="'Liberation Mono', 'Courier New'" style:font-family-generic="modern" style:font-pitch="fixed" style:font-name-complex="Liberation Mono2" style:font-family-complex="'Liberation Mono', 'Courier New'" style:font-family-generic-complex="modern" style:font-pitch-complex="fixed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Mono2" fo:font-family="'Liberation Mono', 'Courier New'" style:font-family-generic="modern" style:font-pitch="fixed" style:font-name-complex="Liberation Mono2" style:font-family-complex="'Liberation Mono', 'Courier New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4.5pt" fo:font-style="normal" fo:text-shadow="none" style:text-underline-style="none" fo:font-weight="normal" style:letter-kerning="true" style:font-size-asian="24.5pt" style:font-style-asian="normal" style:font-weight-asian="normal" style:font-size-complex="24.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52.5999984741211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bf5f9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 style:shrink-to-fit="true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RW Gothic L" fo:font-family="'URW Gothic L'" style:font-style-name="Book" style:font-family-generic="swiss" style:font-pitch="variable" fo:font-size="67.1999969482422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fo:min-height="0cm" fo:min-width="0cm" draw:shadow-offset-y="-0.05cm"/>
    </style:style>
    <style:style style:name="Mgr4" style:family="graphic" style:parent-style-name="standard">
      <style:graphic-properties draw:stroke="none" draw:fill="none" draw:fill-color="#ffffff" fo:min-height="3cm"/>
    </style:style>
    <style:style style:name="Mgr5" style:family="graphic" style:parent-style-name="standard">
      <style:graphic-properties draw:textarea-vertical-align="middle" fo:min-height="0cm" fo:min-width="0cm"/>
    </style:style>
    <style:style style:name="Mgr6" style:family="graphic" style:parent-style-name="standard">
      <style:graphic-properties draw:stroke="none" draw:fill="none" draw:fill-color="#ffffff" fo:min-height="9.25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ypograph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Typograph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ypograph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custom-shape draw:style-name="Mgr3" draw:text-style-name="MP7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text-style-name="MP8" draw:layer="backgroundobjects" svg:width="6.5cm" svg:height="1.25cm" svg:x="1.25cm" svg:y="14.25cm" presentation:class="date-time">
        <draw:text-box>
          <text:p text:style-name="MP8"><presentation:date-time/><text:s/></text:p>
        </draw:text-box>
      </draw:frame>
      <draw:frame presentation:style-name="Mpr4" draw:text-style-name="MP9" draw:layer="backgroundobjects" svg:width="9cm" svg:height="1.25cm" svg:x="9.5cm" svg:y="14.25cm" presentation:class="footer">
        <draw:text-box>
          <text:p text:style-name="MP9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10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11" draw:layer="backgroundobjects" svg:width="25cm" svg:height="3.25cm" svg:x="1.25cm" svg:y="10.75cm">
        <draw:text-box>
          <text:p/>
        </draw:text-box>
      </draw:frame>
      <draw:frame presentation:style-name="Vivi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5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BrightBlue" style:page-layout-name="PM1" draw:style-name="Mdp1">
      <draw:custom-shape draw:style-name="Mgr5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6" draw:text-style-name="MP11" draw:layer="backgroundobjects" svg:width="25cm" svg:height="9.5cm" svg:x="1.5cm" svg:y="4cm">
        <draw:text-box>
          <text:p/>
        </draw:text-box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pography" style:page-layout-name="PM1" draw:style-name="Mdp1">
      <draw:frame draw:style-name="Mgr7" draw:text-style-name="MP12" draw:layer="backgroundobjects" svg:width="28cm" svg:height="15.749cm" svg:x="0cm" svg:y="0cm">
        <draw:image xlink:href="Pictures/10000201000006CB000003E600B6923C86DC5C62.png" xlink:type="simple" xlink:show="embed" xlink:actuate="onLoad" loext:mime-type="image/png">
          <text:p/>
        </draw:image>
      </draw:frame>
      <draw:frame presentation:style-name="Typography-title" draw:layer="backgroundobjects" svg:width="25.199cm" svg:height="11.388cm" svg:x="1.4cm" svg:y="0.627cm" presentation:class="title" presentation:placeholder="true">
        <draw:text-box/>
      </draw:frame>
      <draw:frame presentation:style-name="Typography-outline1" draw:layer="backgroundobjects" svg:width="25.199cm" svg:height="0.602cm" svg:x="1.4cm" svg:y="13.476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5.265cm" svg:height="10.475cm" svg:x="3.161cm" svg:y="2.123cm" presentation:class="page"/>
        <draw:frame presentation:style-name="Typograph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4:38:33.160000000</meta:creation-date>
    <meta:editing-duration>PT33M41S</meta:editing-duration>
    <meta:editing-cycles>3</meta:editing-cycles>
    <meta:generator>LibreOffice/6.4.7.2$Linux_X86_64 LibreOffice_project/40$Build-2</meta:generator>
    <dc:title>Vivid_classic_elfak</dc:title>
    <dc:date>2023-04-26T16:23:36.752000000</dc:date>
    <meta:document-statistic meta:object-count="160"/>
  </office:meta>
</office:document-meta>
</file>